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F000001DD26F749DD.png" manifest:media-type="image/png"/>
  <manifest:file-entry manifest:full-path="Pictures/10000001000001DC0000016FC0A52B0E.png" manifest:media-type="image/png"/>
  <manifest:file-entry manifest:full-path="Pictures/1000000100000257000001FE9BFBD558.png" manifest:media-type="image/png"/>
  <manifest:file-entry manifest:full-path="Pictures/10000001000003C00000023B13BEBD39.png" manifest:media-type="image/png"/>
  <manifest:file-entry manifest:full-path="Pictures/100000010000035E00000176B06AC58A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Black" svg:font-family="'Arial Black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draw:fit-to-size="false" style:shrink-to-fit="false" fo:min-height="2.033cm" fo:padding-top="0.035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top" draw:auto-grow-height="true" draw:fit-to-size="false" style:shrink-to-fit="false" fo:min-height="8.933cm" fo:padding-top="0.125cm" fo:padding-bottom="0.125cm" fo:padding-left="0.25cm" fo:padding-right="0.2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top" draw:auto-grow-height="true" draw:fit-to-size="false" style:shrink-to-fit="false" fo:min-height="1.34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draw:fill="none" draw:textarea-vertical-align="top" draw:auto-grow-height="true" draw:fit-to-size="false" style:shrink-to-fit="false" fo:min-height="0.848cm" fo:padding-top="0.127cm" fo:padding-bottom="0.127cm" fo:padding-left="0.254cm" fo:padding-right="0.254cm" fo:wrap-option="no-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style:repeat="stretch" draw:image-opacity="100%" style:mirror="none" loext:decorative="false"/>
    </style:style>
    <style:style style:name="gr7" style:family="graphic" style:parent-style-name="standard">
      <style:graphic-properties draw:stroke="none" draw:fill="none" draw:textarea-vertical-align="top" draw:auto-grow-height="true" draw:fit-to-size="false" style:shrink-to-fit="false" fo:min-height="1.575cm" fo:padding-top="0.127cm" fo:padding-bottom="0.127cm" fo:padding-left="0.254cm" fo:padding-right="0.254cm" fo:wrap-option="no-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auto-grow-height="true" draw:fit-to-size="false" style:shrink-to-fit="false" fo:min-height="1.575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auto-grow-height="true" draw:fit-to-size="false" style:shrink-to-fit="false" fo:min-height="1.694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draw:auto-grow-height="true" draw:fit-to-size="false" style:shrink-to-fit="false" fo:min-height="8.13cm" fo:padding-top="0.127cm" fo:padding-bottom="0.127cm" fo:padding-left="0.254cm" fo:padding-right="0.254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top" draw:auto-grow-height="true" draw:fit-to-size="false" style:shrink-to-fit="false" fo:min-height="12.065cm" fo:padding-top="0.155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top" draw:auto-grow-height="true" draw:fit-to-size="false" style:shrink-to-fit="false" fo:min-height="3.428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top" draw:auto-grow-height="true" draw:fit-to-size="false" style:shrink-to-fit="false" fo:min-height="2.697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1">
      <style:graphic-properties draw:stroke="none" draw:fill="none" draw:textarea-vertical-align="top" draw:auto-grow-height="true" draw:fit-to-size="false" style:shrink-to-fit="false" fo:min-height="10.797cm" fo:padding-top="0.293cm" fo:padding-bottom="0cm" fo:padding-left="0cm" fo:padding-right="0cm" loext:decorative="false"/>
      <style:paragraph-properties style:writing-mode="lr-tb"/>
    </style:style>
    <style:style style:name="pr2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1">
      <style:graphic-properties draw:stroke="none" draw:fill="none" draw:textarea-vertical-align="top" draw:auto-grow-height="false" draw:auto-grow-width="false" fo:min-height="0cm" loext:decorative="false"/>
      <style:paragraph-properties style:writing-mode="lr-tb"/>
    </style:style>
    <style:style style:name="pr3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title">
      <style:graphic-properties draw:stroke="none" draw:fill="none" draw:textarea-vertical-align="top" draw:auto-grow-height="true" draw:fit-to-size="false" style:shrink-to-fit="false" fo:min-height="1.864cm" fo:padding-top="1.294cm" fo:padding-bottom="0cm" fo:padding-left="0cm" fo:padding-right="0cm" loext:decorative="false"/>
      <style:paragraph-properties style:writing-mode="lr-tb"/>
    </style:style>
    <style:style style:name="pr4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backgroundobjects">
      <style:graphic-properties draw:stroke="none" draw:fill="none" draw:fill-color="#ffffff" draw:textarea-vertical-align="top" draw:auto-grow-height="true" draw:fit-to-size="false" style:shrink-to-fit="false" fo:min-height="1.349cm" fo:padding-top="0cm" fo:padding-bottom="0cm" fo:padding-left="0cm" fo:padding-right="0cm" loext:decorative="false"/>
      <style:paragraph-properties style:writing-mode="lr-tb"/>
    </style:style>
    <style:style style:name="pr5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title">
      <style:graphic-properties draw:stroke="none" draw:fill="none" draw:textarea-vertical-align="top" draw:auto-grow-height="true" draw:fit-to-size="false" style:shrink-to-fit="false" fo:min-height="1.864cm" fo:padding-top="1.294cm" fo:padding-bottom="0cm" fo:padding-left="0cm" fo:padding-right="0cm" loext:decorative="false"/>
      <style:paragraph-properties style:writing-mode="lr-tb"/>
    </style:style>
    <style:style style:name="pr6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1">
      <style:graphic-properties draw:stroke="none" draw:fill="none" draw:textarea-vertical-align="top" draw:auto-grow-height="false" draw:auto-grow-width="false" fo:min-height="0cm" loext:decorative="false"/>
      <style:paragraph-properties style:writing-mode="lr-tb"/>
    </style:style>
    <style:style style:name="pr7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title">
      <style:graphic-properties draw:stroke="none" draw:fill="none" fo:min-height="65.969cm" loext:decorative="false"/>
      <style:paragraph-properties style:writing-mode="lr-tb"/>
    </style:style>
    <style:style style:name="pr8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1">
      <style:graphic-properties draw:stroke="none" draw:fill="none" draw:auto-grow-height="false" draw:auto-grow-width="false" fo:min-height="0cm" loext:decorative="false"/>
      <style:paragraph-properties style:writing-mode="lr-tb"/>
    </style:style>
    <style:style style:name="pr9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backgroundobjects">
      <style:graphic-properties draw:stroke="none" draw:fill="none" draw:fill-color="#ffffff" draw:textarea-vertical-align="bottom" draw:auto-grow-height="false" draw:auto-grow-width="false" fo:min-height="0.101cm" loext:decorative="false"/>
      <style:paragraph-properties style:writing-mode="lr-tb"/>
    </style:style>
    <style:style style:name="pr10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title">
      <style:graphic-properties draw:stroke="none" draw:fill="none" draw:textarea-vertical-align="top" draw:auto-grow-height="true" draw:fit-to-size="false" style:shrink-to-fit="false" fo:min-height="3.181cm" fo:padding-top="0.032cm" fo:padding-bottom="0cm" fo:padding-left="0cm" fo:padding-right="0cm" loext:decorative="false"/>
      <style:paragraph-properties style:writing-mode="lr-tb"/>
    </style:style>
    <style:style style:name="co1" style:family="table-column">
      <style:table-column-properties style:column-width="7.027cm" style:use-optimal-column-width="false"/>
    </style:style>
    <style:style style:name="co2" style:family="table-column">
      <style:table-column-properties style:column-width="17.62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48cm" style:use-optimal-row-height="false"/>
    </style:style>
    <style:style style:name="ro3" style:family="table-row">
      <style:table-row-properties style:row-height="1.699cm" style:use-optimal-row-height="false"/>
    </style:style>
    <style:style style:name="ro4" style:family="table-row">
      <style:table-row-properties style:row-height="1.522cm" style:use-optimal-row-height="false"/>
    </style:style>
    <style:style style:name="ro5" style:family="table-row">
      <style:table-row-properties style:row-height="1.256cm" style:use-optimal-row-height="false"/>
    </style:style>
    <style:style style:name="ce1" style:family="table-cell">
      <loext:graphic-properties draw:fill="none" fo:padding-top="0.1cm" fo:padding-bottom="0.1cm" fo:padding-left="0.1cm" fo:padding-right="0.1cm"/>
      <style:paragraph-properties fo:border="0.28pt solid #000000"/>
    </style:style>
    <style:style style:name="ce2" style:family="table-cell">
      <loext:graphic-properties draw:fill="none" fo:padding-top="0.01cm" fo:padding-bottom="0.01cm" fo:padding-left="0.01cm" fo:padding-right="0.01cm"/>
      <style:paragraph-properties fo:border="0.99pt solid #000000"/>
    </style:style>
    <style:style style:name="P1" style:family="paragraph">
      <style:paragraph-properties fo:margin-left="0.037cm" fo:margin-right="0.014cm" fo:margin-top="0.293cm" fo:margin-bottom="0cm" fo:line-height="2.06cm" fo:text-align="center" fo:text-indent="-0.002cm"/>
    </style:style>
    <style:style style:name="P2" style:family="paragraph">
      <loext:graphic-properties draw:fill="none"/>
    </style:style>
    <style:style style:name="P3" style:family="paragraph">
      <style:paragraph-properties fo:margin-left="0.035cm" fo:margin-right="0cm" fo:margin-top="0.034cm" fo:margin-bottom="0cm" fo:line-height="100%" fo:text-align="left" fo:text-indent="0cm"/>
    </style:style>
    <style:style style:name="P4" style:family="paragraph">
      <style:paragraph-properties fo:margin-left="0.035cm" fo:margin-right="0cm" fo:margin-top="0.035cm" fo:margin-bottom="0cm" fo:line-height="100%" fo:text-align="left" fo:text-indent="0cm"/>
    </style:style>
    <style:style style:name="P5" style:family="paragraph">
      <style:paragraph-properties fo:margin-left="0cm" fo:margin-right="0cm" fo:margin-top="0cm" fo:margin-bottom="0cm" fo:line-height="100%" fo:text-align="left" fo:text-indent="0cm"/>
    </style:style>
    <style:style style:name="P6" style:family="paragraph">
      <style:paragraph-properties fo:margin-left="0cm" fo:margin-right="0cm" fo:margin-top="0.419cm" fo:margin-bottom="0.35cm" fo:line-height="100%" fo:text-align="left" fo:text-indent="0cm"/>
    </style:style>
    <style:style style:name="P7" style:family="paragraph">
      <style:paragraph-properties fo:margin-left="0cm" fo:margin-right="0cm" fo:margin-top="0cm" fo:margin-bottom="0.35cm" fo:line-height="100%" fo:text-align="left" fo:text-indent="0cm"/>
    </style:style>
    <style:style style:name="P8" style:family="paragraph">
      <style:paragraph-properties fo:margin-left="0.866cm" fo:margin-right="0cm" fo:margin-top="0cm" fo:margin-bottom="0cm" fo:line-height="1.348cm" fo:text-align="right" fo:text-indent="0cm"/>
    </style:style>
    <style:style style:name="P9" style:family="paragraph">
      <style:paragraph-properties fo:margin-left="0.866cm" fo:margin-right="0cm" fo:margin-top="0cm" fo:margin-bottom="0cm" fo:line-height="1.348cm" fo:text-align="right" fo:text-indent="0cm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P11" style:family="paragraph">
      <loext:graphic-properties draw:fill="none" style:repeat="stretch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.211cm" fo:margin-right="0cm" fo:text-indent="0cm"/>
    </style:style>
    <style:style style:name="P14" style:family="paragraph">
      <style:paragraph-properties fo:margin-top="0.155cm" fo:margin-bottom="0cm" fo:line-height="90%" fo:text-align="left"/>
    </style:style>
    <style:style style:name="P15" style:family="paragraph">
      <style:paragraph-properties fo:margin-top="0cm" fo:margin-bottom="0cm" fo:line-height="90%" fo:text-align="lef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left="0.866cm" fo:margin-right="0cm" fo:margin-top="0cm" fo:margin-bottom="0cm" fo:line-height="1.348cm" fo:text-align="right" fo:text-indent="0cm"/>
    </style:style>
    <style:style style:name="P18" style:family="paragraph">
      <style:paragraph-properties fo:text-align="right"/>
      <style:text-properties fo:font-size="14pt" style:font-size-asian="14pt" style:font-size-complex="14pt"/>
    </style:style>
    <style:style style:name="P19" style:family="paragraph">
      <style:paragraph-properties fo:margin-left="0.035cm" fo:margin-right="0cm" fo:margin-top="0.032cm" fo:margin-bottom="0cm" fo:line-height="100%" fo:text-align="left" fo:text-indent="0cm"/>
    </style:style>
    <style:style style:name="T1" style:family="text">
      <style:text-properties fo:color="#000000" loext:opacity="100%" style:text-line-through-style="none" style:text-line-through-type="none" style:font-name="Arial" fo:font-size="54pt" fo:language="ru" fo:country="RU" style:text-underline-style="none" fo:font-weight="bold" style:font-size-asian="54pt" style:font-name-complex="Arial" style:font-size-complex="54pt"/>
    </style:style>
    <style:style style:name="T2" style:family="text">
      <style:text-properties fo:color="#000000" loext:opacity="100%" style:text-line-through-style="none" style:text-line-through-type="none" style:font-name="Arial" fo:font-size="44pt" style:text-underline-style="none" fo:font-weight="bold" style:font-size-asian="44pt" style:font-name-complex="Arial" style:font-size-complex="44pt"/>
    </style:style>
    <style:style style:name="T3" style:family="text">
      <style:text-properties fo:color="#000000" loext:opacity="100%" style:text-line-through-style="none" style:text-line-through-type="none" style:font-name="Arial" fo:font-size="44pt" fo:letter-spacing="-0.101cm" style:text-underline-style="none" fo:font-weight="bold" style:font-size-asian="44pt" style:font-name-complex="Arial" style:font-size-complex="44pt"/>
    </style:style>
    <style:style style:name="T4" style:family="text">
      <style:text-properties fo:color="#000000" loext:opacity="100%" style:text-line-through-style="none" style:text-line-through-type="none" style:font-name="Arial" fo:font-size="44pt" fo:letter-spacing="-0.004cm" fo:language="ru" fo:country="RU" style:text-underline-style="none" fo:font-weight="bold" style:font-size-asian="44pt" style:font-name-complex="Arial" style:font-size-complex="44pt"/>
    </style:style>
    <style:style style:name="T5" style:family="text">
      <style:text-properties fo:color="#000000" loext:opacity="100%" style:text-line-through-style="none" style:text-line-through-type="none" style:font-name="Arial" fo:font-size="44pt" fo:letter-spacing="-0.004cm" style:text-underline-style="none" fo:font-weight="bold" style:font-size-asian="44pt" style:font-name-complex="Arial" style:font-size-complex="44pt"/>
    </style:style>
    <style:style style:name="T6" style:family="text">
      <style:text-properties style:text-line-through-style="none" style:text-line-through-type="none" style:font-name="Arial" fo:font-size="24pt" fo:letter-spacing="-0.004cm" style:text-underline-style="none" fo:font-weight="bold" style:font-size-asian="24pt" style:font-name-complex="Arial" style:font-size-complex="24pt"/>
    </style:style>
    <style:style style:name="T7" style:family="text">
      <style:text-properties style:text-line-through-style="none" style:text-line-through-type="none" style:font-name="Arial" fo:font-size="24pt" fo:letter-spacing="-0.004cm" fo:language="ru" fo:country="RU" style:text-underline-style="none" fo:font-weight="bold" style:font-size-asian="24pt" style:font-name-complex="Arial" style:font-size-complex="24pt"/>
    </style:style>
    <style:style style:name="T8" style:family="text">
      <style:text-properties style:text-line-through-style="none" style:text-line-through-type="none" style:font-name="Arial" fo:font-size="24pt" fo:letter-spacing="-0.004cm" fo:language="ru" fo:country="RU" style:text-underline-style="none" style:font-size-asian="24pt" style:font-name-complex="Arial" style:font-size-complex="24pt"/>
    </style:style>
    <style:style style:name="T9" style:family="text">
      <style:text-properties style:text-line-through-style="none" style:text-line-through-type="none" style:font-name="Arial" fo:font-size="24pt" fo:language="ru" fo:country="RU" style:text-underline-style="none" style:font-size-asian="24pt" style:font-name-complex="Arial" style:font-size-complex="24pt"/>
    </style:style>
    <style:style style:name="T10" style:family="text">
      <style:text-properties style:text-line-through-style="none" style:text-line-through-type="none" style:font-name="Arial" fo:font-size="24pt" fo:language="ru" fo:country="RU" style:text-underline-style="none" fo:font-weight="bold" style:font-size-asian="24pt" style:font-name-complex="Arial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language="ru" fo:country="RU" style:font-size-asian="24pt" style:font-size-complex="24pt"/>
    </style:style>
    <style:style style:name="T13" style:family="text">
      <style:text-properties style:font-name="Arial" fo:font-size="36pt" style:font-size-asian="36pt" style:font-name-complex="Arial" style:font-size-complex="36pt"/>
    </style:style>
    <style:style style:name="T14" style:family="text">
      <style:text-properties style:font-name="Arial" fo:font-size="36pt" fo:language="ru" fo:country="RU" style:font-size-asian="36pt" style:font-name-complex="Arial" style:font-size-complex="36pt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fo:font-weight="bold"/>
    </style:style>
    <style:style style:name="T17" style:family="text">
      <style:text-properties fo:font-size="20pt" fo:language="ru" fo:country="RU" style:font-size-asian="20pt" style:font-size-complex="20pt"/>
    </style:style>
    <style:style style:name="T18" style:family="text">
      <style:text-properties style:text-line-through-style="none" style:text-line-through-type="none" fo:font-size="20pt" fo:language="ru" fo:country="RU" style:font-size-asian="20pt" style:font-size-complex="20pt"/>
    </style:style>
    <style:style style:name="T19" style:family="text">
      <style:text-properties style:text-line-through-style="none" style:text-line-through-type="none" fo:font-size="20pt" style:font-size-asian="20pt" style:font-size-complex="20pt"/>
    </style:style>
    <style:style style:name="T20" style:family="text">
      <style:text-properties style:text-line-through-style="none" style:text-line-through-type="none" style:font-name="Arial" fo:font-size="20pt" fo:language="ru" fo:country="RU" style:font-size-asian="20pt" style:font-name-complex="Arial" style:font-size-complex="20pt"/>
    </style:style>
    <style:style style:name="T21" style:family="text">
      <style:text-properties style:text-line-through-style="none" style:text-line-through-type="none" style:font-name="Arial" fo:font-size="20pt" style:font-size-asian="20pt" style:font-name-complex="Arial" style:font-size-complex="20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000000" loext:opacity="100%" style:font-name="Arial" fo:font-size="24pt" style:text-underline-style="none" style:font-size-asian="24pt" style:font-name-complex="Arial" style:font-size-complex="24pt"/>
    </style:style>
    <style:style style:name="T24" style:family="text">
      <style:text-properties fo:color="#000000" loext:opacity="100%" style:font-name="Arial" fo:font-size="24pt" style:text-underline-style="none" fo:font-weight="bold" style:font-size-asian="24pt" style:font-name-complex="Arial" style:font-size-complex="24pt"/>
    </style:style>
    <style:style style:name="T25" style:family="text">
      <style:text-properties fo:color="#000000" loext:opacity="100%" style:font-name="Arial" fo:font-size="24pt" fo:language="ru" fo:country="RU" style:text-underline-style="none" style:font-size-asian="24pt" style:font-name-complex="Arial" style:font-size-complex="24pt"/>
    </style:style>
    <style:style style:name="T26" style:family="text">
      <style:text-properties fo:color="#000000" loext:opacity="100%" style:text-line-through-style="none" style:text-line-through-type="none" style:font-name="Arial" fo:font-size="24pt" fo:language="en" fo:country="US" style:text-underline-style="none" style:font-size-asian="24pt" style:font-name-complex="Arial" style:font-size-complex="24pt"/>
    </style:style>
    <style:style style:name="T27" style:family="text">
      <style:text-properties fo:color="#000000" loext:opacity="100%" style:text-line-through-style="none" style:text-line-through-type="none" style:font-name="Arial" fo:font-size="24pt" fo:language="ru" fo:country="RU" style:text-underline-style="none" style:font-size-asian="24pt" style:font-name-complex="Arial" style:font-size-complex="24pt"/>
    </style:style>
    <style:style style:name="T28" style:family="text">
      <style:text-properties fo:color="#000000" loext:opacity="100%" style:text-line-through-style="none" style:text-line-through-type="none" style:font-name="Arial" fo:font-size="44pt" fo:language="ru" fo:country="RU" style:text-underline-style="none" fo:font-weight="bold" style:font-size-asian="44pt" style:font-name-complex="Arial" style:font-size-complex="44pt"/>
    </style:style>
    <style:style style:name="T29" style:family="text">
      <style:text-properties style:font-name="Arial" fo:font-size="24pt" fo:language="ru" fo:country="RU" fo:font-style="italic" style:font-name-asian="Arial" style:font-size-asian="24pt" style:font-style-asian="italic" style:font-name-complex="Arial" style:font-size-complex="24pt" style:font-style-complex="italic"/>
    </style:style>
    <style:style style:name="T30" style:family="text">
      <style:text-properties style:font-name="Arial" fo:font-size="24pt" fo:language="ru" fo:country="RU" style:font-name-asian="Arial" style:font-size-asian="24pt" style:font-name-complex="Arial" style:font-size-complex="24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000000" loext:opacity="100%" style:text-line-through-style="none" style:text-line-through-type="none" style:font-name="Arial Black" fo:font-size="44pt" style:text-underline-style="none" style:font-size-asian="44pt" style:font-name-complex="Arial Black" style:font-size-complex="44pt"/>
    </style:style>
    <style:style style:name="T33" style:family="text">
      <style:text-properties fo:color="#000000" loext:opacity="100%" style:text-line-through-style="none" style:text-line-through-type="none" style:font-name="Arial Black" fo:font-size="44pt" fo:letter-spacing="-0.042cm" style:text-underline-style="none" style:font-size-asian="44pt" style:font-name-complex="Arial Black" style:font-size-complex="44pt"/>
    </style:style>
    <style:style style:name="T34" style:family="text">
      <style:text-properties fo:color="#000000" loext:opacity="100%" style:text-line-through-style="none" style:text-line-through-type="none" style:font-name="Arial Black" fo:font-size="44pt" fo:letter-spacing="-0.034cm" style:text-underline-style="none" style:font-size-asian="44pt" style:font-name-complex="Arial Black" style:font-size-complex="44pt"/>
    </style:style>
    <style:style style:name="T35" style:family="text">
      <style:text-properties fo:color="#000000" loext:opacity="100%" style:text-line-through-style="none" style:text-line-through-type="none" style:font-name="Arial Black" fo:font-size="44pt" fo:letter-spacing="-0.004cm" style:text-underline-style="none" style:font-size-asian="44pt" style:font-name-complex="Arial Black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035cm"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" presentation:presentation-page-layout-name="AL1T1">
        <draw:frame draw:name="object 2" presentation:style-name="pr1" draw:text-style-name="P2" draw:layer="layout" svg:width="33.65cm" svg:height="11.09cm" svg:x="0.106cm" svg:y="1.482cm" presentation:class="outline">
          <draw:text-box>
            <text:p text:style-name="P1"><text:span text:style-name="T1">Разработка мобильного приложения для фитнеса на платформе Android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становка задачи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" presentation:presentation-page-layout-name="AL1T1">
        <draw:frame draw:name="object 2" presentation:style-name="pr3" draw:text-style-name="P2" draw:layer="layout" svg:width="28.78cm" svg:height="3.158cm" svg:x="0cm" svg:y="0cm" presentation:class="title">
          <draw:text-box>
            <text:p text:style-name="P3"><text:span text:style-name="T2">Постановка</text:span><text:span text:style-name="T3"> </text:span><text:span text:style-name="T4">цели и </text:span><text:span text:style-name="T5">задач</text:span></text:p>
          </draw:text-box>
        </draw:frame>
        <draw:frame draw:name="object 3" draw:style-name="gr1" draw:text-style-name="P2" draw:layer="layout" svg:width="30.47cm" svg:height="2.068cm" svg:x="2.548cm" svg:y="4.133cm">
          <draw:text-box>
            <text:p text:style-name="P4"><text:span text:style-name="T6">Цель:</text:span><text:span text:style-name="T7"> </text:span><text:span text:style-name="T8">р</text:span><text:span text:style-name="T9">азработка мобильного приложения для фитнеса на платформе Android</text:span></text:p>
          </draw:text-box>
        </draw:frame>
        <draw:frame draw:name="TextBox 13" draw:style-name="gr2" draw:text-style-name="P2" draw:layer="layout" svg:width="29.88cm" svg:height="9.183cm" svg:x="2.548cm" svg:y="7.408cm">
          <draw:text-box>
            <text:p text:style-name="P5"><text:span text:style-name="T10">Задачи:</text:span></text:p>
            <text:p text:style-name="P6"><text:span text:style-name="T11">1. Разработка пользовательского интерфейса с интуитивной навигацией</text:span><text:span text:style-name="T12">.</text:span></text:p>
            <text:p text:style-name="P7"><text:span text:style-name="T11">2. Создание системы работы с данными и локальной базой</text:span><text:span text:style-name="T12"> данных.</text:span></text:p>
            <text:p text:style-name="P7"><text:span text:style-name="T11">3. Реализация бизнес-логики для тренировок и отслеживания прогресса</text:span><text:span text:style-name="T12">.</text:span></text:p>
            <text:p text:style-name="P7"><text:span text:style-name="T11">4. Проектирование и разработка серверного приложения (бэкенда)</text:span><text:span text:style-name="T12">.</text:span></text:p>
          </draw:text-box>
        </draw:frame>
        <draw:frame draw:name="object 10" draw:style-name="gr3" draw:text-style-name="P2" draw:layer="layout" svg:width="5.222cm" svg:height="1.349cm" svg:x="27.5cm" svg:y="17.52cm">
          <draw:text-box>
            <text:p text:style-name="P8"><text:span text:style-name="T13">2 из 1</text:span><text:span text:style-name="T14">1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page3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" presentation:presentation-page-layout-name="AL1T1">
        <draw:frame draw:name="Object_ce1" draw:style-name="gr4" draw:layer="layout" svg:width="31.679cm" svg:height="7.453cm" svg:x="1.001cm" svg:y="6.26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Название</text:span></text:p>
              </table:table-cell>
              <table:table-cell>
                <text:p><text:span text:style-name="T15">Тип приложения</text:span></text:p>
              </table:table-cell>
              <table:table-cell>
                <text:p><text:span text:style-name="T15">Ключевые недостатки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16">Strong / Hevy</text:span></text:p>
              </table:table-cell>
              <table:table-cell>
                <text:p><text:span text:style-name="T15">Журнал силовых тренировок</text:span></text:p>
              </table:table-cell>
              <table:table-cell>
                <text:p><text:span text:style-name="T15">Отсутствие адаптивности планов, нет интеграции с данными о восстановлении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16">MyFitnessPal</text:span></text:p>
              </table:table-cell>
              <table:table-cell>
                <text:p><text:span text:style-name="T15">Трекер питания и активности</text:span></text:p>
              </table:table-cell>
              <table:table-cell>
                <text:p><text:span text:style-name="T15">Слабая связь с конкретными тренировочными программами, нет анализа прогресса нагрузки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16">Samsung Health </text:span>/<text:span text:style-name="T16"> Google Fit </text:span></text:p>
              </table:table-cell>
              <table:table-cell>
                <text:p><text:span text:style-name="T15">Агрегатор данных (шаги, пульс, сон)</text:span></text:p>
              </table:table-cell>
              <table:table-cell>
                <text:p><text:span text:style-name="T15">Нет умных рекомендация по корректировке тренировок на основе сна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16">Adidas Training</text:span></text:p>
              </table:table-cell>
              <table:table-cell>
                <text:p><text:span text:style-name="T15">Готовые тренировочные планы</text:span></text:p>
              </table:table-cell>
              <table:table-cell>
                <text:p><text:span text:style-name="T15">Жесткие, не адаптивные планы, рассчитанные на «среднего» пользовател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bject 1" draw:style-name="gr3" draw:text-style-name="P2" draw:layer="layout" svg:width="5.22cm" svg:height="1.349cm" svg:x="27.5cm" svg:y="17.52cm">
          <draw:text-box>
            <text:p text:style-name="P8"><text:span text:style-name="T13">3 из 1</text:span><text:span text:style-name="T14">1</text:span></text:p>
          </draw:text-box>
        </draw:frame>
        <draw:frame draw:name="object 5" presentation:style-name="pr3" draw:text-style-name="P2" draw:layer="layout" svg:width="28.78cm" svg:height="3.158cm" svg:x="0cm" svg:y="0cm" presentation:class="title">
          <draw:text-box>
            <text:p text:style-name="P3"><text:span text:style-name="T2">Обзор существующих приложений</text:span></text:p>
          </draw:text-box>
        </draw:frame>
        <draw:frame draw:style-name="gr5" draw:text-style-name="P2" draw:layer="layout" svg:width="17.08cm" svg:height="1.102cm" svg:x="8.4cm" svg:y="14.6cm">
          <draw:text-box>
            <text:p><text:span text:style-name="T17">Табл. 1. Существующие приложения для фитнеса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page4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" presentation:presentation-page-layout-name="AL1T1">
        <draw:frame draw:name="Object_ce17" draw:style-name="gr4" draw:layer="layout" svg:width="31.679cm" svg:height="13.919cm" svg:x="1.202cm" svg:y="3.401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15">Категория</text:span></text:p>
              </table:table-cell>
              <table:table-cell>
                <text:p><text:span text:style-name="T15">Технология</text:span></text:p>
              </table:table-cell>
              <table:table-cell>
                <text:p><text:span text:style-name="T15">Назначение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6">Язык и среда</text:span></text:p>
              </table:table-cell>
              <table:table-cell>
                <text:p><text:span text:style-name="T15">Kotlin, Android Studio</text:span></text:p>
              </table:table-cell>
              <table:table-cell>
                <text:p><text:span text:style-name="T15">Основной язык разработки, среда с поддержкой современных фич (null-безопасность, корутины).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6">UI / Интерфейс</text:span></text:p>
              </table:table-cell>
              <table:table-cell>
                <text:p><text:span text:style-name="T15">Jetpack Compose, Material Design 3</text:span></text:p>
              </table:table-cell>
              <table:table-cell>
                <text:p><text:span text:style-name="T15">Современная декларативная верстка, реактивное обновление UI, адаптивный дизайн.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6">Локальное хранение</text:span></text:p>
              </table:table-cell>
              <table:table-cell>
                <text:p><text:span text:style-name="T15">Room (SQLite)</text:span></text:p>
              </table:table-cell>
              <table:table-cell>
                <text:p><text:span text:style-name="T15">ORM-абстракция с проверкой запросов на этапе компиляции, интеграция с Coroutines.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6">Сеть и синхронизация</text:span></text:p>
              </table:table-cell>
              <table:table-cell>
                <text:p><text:span text:style-name="T15">Retrofit + OkHttp, Gson</text:span></text:p>
              </table:table-cell>
              <table:table-cell>
                <text:p><text:span text:style-name="T15">Описание API через интерфейсы, автоматическая сериализация, интерцепторы для JWT.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6">Асинхронность</text:span></text:p>
              </table:table-cell>
              <table:table-cell>
                <text:p><text:span text:style-name="T15">Kotlin Coroutines + Flow</text:span></text:p>
              </table:table-cell>
              <table:table-cell>
                <text:p><text:span text:style-name="T15">Выполнение операций в фоне. Легковесные потоки, structured concurrency, простой и читаемый код.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16">Внедрение зависимостей</text:span></text:p>
              </table:table-cell>
              <table:table-cell>
                <text:p><text:span text:style-name="T15">Koin</text:span></text:p>
              </table:table-cell>
              <table:table-cell>
                <text:p><text:span text:style-name="T15">Простота настройки, Kotlin-first подход.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6">Серверная часть (бэкенд)</text:span></text:p>
              </table:table-cell>
              <table:table-cell>
                <text:p><text:span text:style-name="T15">Ktor, Exposed (ORM для PostgreSQL), JWT</text:span></text:p>
              </table:table-cell>
              <table:table-cell>
                <text:p><text:span text:style-name="T15">Реализация REST API, хранение данных пользователей, аутентификация по токенам.</text:span></text:p>
              </table:table-cell>
            </table:table-row>
            <table:table-row table:style-name="ro5" table:default-cell-style-name="ce1">
              <table:table-cell table:style-name="ce2">
                <text:p><text:span text:style-name="T16">Тестирование API</text:span></text:p>
              </table:table-cell>
              <table:table-cell>
                <text:p><text:span text:style-name="T15">Postman</text:span></text:p>
              </table:table-cell>
              <table:table-cell>
                <text:p><text:span text:style-name="T15">Проверка эндпоинтов, автоматизация тестов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object 6" draw:style-name="gr3" draw:text-style-name="P2" draw:layer="layout" svg:width="5.22cm" svg:height="1.349cm" svg:x="27.5cm" svg:y="17.52cm">
          <draw:text-box>
            <text:p text:style-name="P8"><text:span text:style-name="T13">4 из 1</text:span><text:span text:style-name="T14">1</text:span></text:p>
          </draw:text-box>
        </draw:frame>
        <draw:frame draw:name="object 12" presentation:style-name="pr3" draw:text-style-name="P2" draw:layer="layout" svg:width="28.78cm" svg:height="3.158cm" svg:x="0cm" svg:y="0cm" presentation:class="title">
          <draw:text-box>
            <text:p text:style-name="P3"><text:span text:style-name="T2">Технологический стек</text:span></text:p>
          </draw:text-box>
        </draw:frame>
        <draw:frame draw:style-name="gr5" draw:text-style-name="P2" draw:layer="layout" svg:width="10.48cm" svg:height="1.102cm" svg:x="11.9cm" svg:y="17.71cm">
          <draw:text-box>
            <text:p><text:span text:style-name="T17">Табл. 2. Технологии в проекте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Этапы реализации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" presentation:presentation-page-layout-name="AL1T1">
        <draw:frame draw:name="object 4" presentation:style-name="pr4" draw:text-style-name="P10" draw:layer="layout" svg:width="5.222cm" svg:height="1.349cm" svg:x="27.5cm" svg:y="17.52cm" presentation:class="page-number">
          <draw:text-box>
            <text:p text:style-name="P9"><text:span text:style-name="T13">5 из 1</text:span><text:span text:style-name="T14">1</text:span></text:p>
          </draw:text-box>
        </draw:frame>
        <draw:frame draw:style-name="gr6" draw:text-style-name="P11" draw:layer="layout" svg:width="29.96cm" svg:height="13cm" svg:x="1.536cm" svg:y="4.14cm">
          <draw:image xlink:href="Pictures/100000010000035E00000176B06AC58A.png" xlink:type="simple" xlink:show="embed" xlink:actuate="onLoad" draw:mime-type="image/png">
            <text:p/>
          </draw:image>
        </draw:frame>
        <draw:frame draw:name="object 7" presentation:style-name="pr5" draw:text-style-name="P2" draw:layer="layout" svg:width="28.78cm" svg:height="3.158cm" svg:x="0cm" svg:y="0cm" presentation:class="title">
          <draw:text-box>
            <text:p text:style-name="P3"><text:span text:style-name="T2">Этапы реализации</text:span></text:p>
          </draw:text-box>
        </draw:frame>
        <draw:frame draw:style-name="gr7" draw:text-style-name="P2" draw:layer="layout" svg:width="15.74cm" svg:height="1.829cm" svg:x="8.644cm" svg:y="17.52cm">
          <draw:text-box>
            <text:p><text:span text:style-name="T17">Рис. 1. Схема этапов реализации приложения</text:span></text:p>
          </draw:text-box>
        </draw:frame>
        <presentation:notes draw:style-name="dp2">
          <draw:frame presentation:style-name="pr6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page6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" presentation:presentation-page-layout-name="AL1T1">
        <draw:frame draw:style-name="gr6" draw:text-style-name="P11" draw:layer="layout" svg:width="19.51cm" svg:height="11.61cm" svg:x="1cm" svg:y="3.393cm">
          <draw:image xlink:href="Pictures/10000001000003C00000023B13BEBD39.png" xlink:type="simple" xlink:show="embed" xlink:actuate="onLoad" draw:mime-type="image/png">
            <text:p/>
          </draw:image>
        </draw:frame>
        <draw:frame draw:style-name="gr6" draw:text-style-name="P11" draw:layer="layout" svg:width="15.85cm" svg:height="13.49cm" svg:x="17cm" svg:y="2.5cm">
          <draw:image xlink:href="Pictures/1000000100000257000001FE9BFBD558.png" xlink:type="simple" xlink:show="embed" xlink:actuate="onLoad" draw:mime-type="image/png">
            <text:p/>
          </draw:image>
        </draw:frame>
        <draw:frame draw:style-name="gr8" draw:text-style-name="P2" draw:layer="layout" svg:width="9.274cm" svg:height="1.825cm" svg:x="4.244cm" svg:y="16.42cm">
          <draw:text-box>
            <text:p><text:span text:style-name="T18">Рис. 2. </text:span><text:span text:style-name="T19">Компоненты MVVM</text:span></text:p>
          </draw:text-box>
        </draw:frame>
        <draw:frame draw:style-name="gr8" draw:text-style-name="P2" draw:layer="layout" svg:width="11.35cm" svg:height="1.825cm" svg:x="19.35cm" svg:y="16.42cm">
          <draw:text-box>
            <text:p><text:span text:style-name="T18">Рис. 3. </text:span><text:span text:style-name="T19">Слои чистой архитектуры</text:span></text:p>
          </draw:text-box>
        </draw:frame>
        <draw:frame draw:name="object 9" draw:style-name="gr3" draw:text-style-name="P2" draw:layer="layout" svg:width="5.22cm" svg:height="1.349cm" svg:x="27.5cm" svg:y="17.52cm">
          <draw:text-box>
            <text:p text:style-name="P8"><text:span text:style-name="T13">6 из 1</text:span><text:span text:style-name="T14">1</text:span></text:p>
          </draw:text-box>
        </draw:frame>
        <draw:frame draw:name="object 13" presentation:style-name="pr5" draw:text-style-name="P2" draw:layer="layout" svg:width="28.78cm" svg:height="3.158cm" svg:x="0cm" svg:y="0cm" presentation:class="title">
          <draw:text-box>
            <text:p text:style-name="P3"><text:span text:style-name="T2">Архитектура</text:span></text:p>
          </draw:text-box>
        </draw:frame>
        <presentation:notes draw:style-name="dp2">
          <draw:frame presentation:style-name="pr6" draw:text-style-name="P2" draw:layer="layout" svg:width="15.24cm" svg:height="11.43cm" svg:x="1.905cm" svg:y="12.06cm" presentation:class="outline">
            <draw:text-box>
              <text:p/>
            </draw:text-box>
          </draw:frame>
        </presentation:notes>
      </draw:page>
      <draw:page draw:name="page7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" presentation:presentation-page-layout-name="AL1T1">
        <draw:frame draw:style-name="gr6" draw:text-style-name="P11" draw:layer="layout" svg:width="12.59cm" svg:height="9.709cm" svg:x="0.5cm" svg:y="5.25cm">
          <draw:image xlink:href="Pictures/10000001000001DC0000016FC0A52B0E.png" xlink:type="simple" xlink:show="embed" xlink:actuate="onLoad" draw:mime-type="image/png">
            <text:p/>
          </draw:image>
        </draw:frame>
        <draw:frame draw:style-name="gr6" draw:text-style-name="P11" draw:layer="layout" svg:width="19.87cm" svg:height="12.62cm" svg:x="13.49cm" svg:y="3.634cm">
          <draw:image xlink:href="Pictures/10000001000002EF000001DD26F749DD.png" xlink:type="simple" xlink:show="embed" xlink:actuate="onLoad" draw:mime-type="image/png">
            <text:p/>
          </draw:image>
        </draw:frame>
        <draw:frame draw:style-name="gr9" draw:text-style-name="P2" draw:layer="layout" svg:width="9.491cm" svg:height="1.944cm" svg:x="2.614cm" svg:y="15.5cm">
          <draw:text-box>
            <text:p><text:span text:style-name="T20">Рис. 4. </text:span><text:span text:style-name="T21">Схема базы данных</text:span></text:p>
            <text:p><text:span text:style-name="T21">мобильного приложения</text:span></text:p>
          </draw:text-box>
        </draw:frame>
        <draw:frame draw:style-name="gr9" draw:text-style-name="P2" draw:layer="layout" svg:width="9.491cm" svg:height="1.944cm" svg:x="18.15cm" svg:y="16.51cm">
          <draw:text-box>
            <text:p text:style-name="P12"><text:span text:style-name="T17">Рис. 5. </text:span><text:span text:style-name="T22">Схема базы данных</text:span></text:p>
            <text:p text:style-name="P12"><text:span text:style-name="T22">серверного приложения</text:span></text:p>
          </draw:text-box>
        </draw:frame>
        <draw:frame draw:name="object 8" draw:style-name="gr3" draw:text-style-name="P2" draw:layer="layout" svg:width="5.222cm" svg:height="1.349cm" svg:x="27.5cm" svg:y="17.52cm">
          <draw:text-box>
            <text:p text:style-name="P8"><text:span text:style-name="T13">7 из 1</text:span><text:span text:style-name="T14">1</text:span></text:p>
          </draw:text-box>
        </draw:frame>
        <draw:frame draw:name="object 14" presentation:style-name="pr5" draw:text-style-name="P2" draw:layer="layout" svg:width="28.78cm" svg:height="3.158cm" svg:x="0cm" svg:y="0cm" presentation:class="title">
          <draw:text-box>
            <text:p text:style-name="P3"><text:span text:style-name="T2">Схемы баз данных</text:span></text:p>
          </draw:text-box>
        </draw:frame>
        <presentation:notes draw:style-name="dp2">
          <draw:frame presentation:style-name="pr6" draw:text-style-name="P2" draw:layer="layout" svg:width="15.24cm" svg:height="11.43cm" svg:x="1.905cm" svg:y="12.06cm" presentation:class="outline">
            <draw:text-box>
              <text:p/>
            </draw:text-box>
          </draw:frame>
        </presentation:notes>
      </draw:page>
      <draw:page draw:name="Этапы реализации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" presentation:presentation-page-layout-name="AL1T1">
        <draw:frame draw:style-name="gr10" draw:text-style-name="P2" draw:layer="layout" svg:width="29.15cm" svg:height="8.384cm" svg:x="0.643cm" svg:y="5.292cm">
          <draw:text-box>
            <text:list text:style-name="L4">
              <text:list-item>
                <text:p text:style-name="P13"><text:span text:style-name="T23">регистрация и аутентификация;</text:span></text:p>
              </text:list-item>
              <text:list-item>
                <text:p text:style-name="P13"><text:span text:style-name="T23">каталог тренировок и конструктор своих планов;</text:span></text:p>
              </text:list-item>
              <text:list-item>
                <text:p text:style-name="P13"><text:span text:style-name="T23">проведение тренировки: таймер, аудиосопровождение;</text:span></text:p>
              </text:list-item>
              <text:list-item>
                <text:p text:style-name="P13"><text:span text:style-name="T23">история выполненных занятий;</text:span></text:p>
              </text:list-item>
              <text:list-item>
                <text:p text:style-name="P13"><text:span text:style-name="T23">трекер сна;</text:span></text:p>
              </text:list-item>
              <text:list-item>
                <text:p text:style-name="P13"><text:span text:style-name="T24">интеллектуальный модуль «Советы»:</text:span><text:span text:style-name="T23"> Анализирует историю тренировок и сна и автоматически предлагает </text:span><text:span text:style-name="T25">уменьшение нагрузки или прогрессивное увеличение сложности тренировок.</text:span></text:p>
              </text:list-item>
            </text:list>
          </draw:text-box>
        </draw:frame>
        <draw:frame draw:name="object 11" draw:style-name="gr3" draw:text-style-name="P2" draw:layer="layout" svg:width="5.219cm" svg:height="1.349cm" svg:x="27.5cm" svg:y="17.52cm">
          <draw:text-box>
            <text:p text:style-name="P8"><text:span text:style-name="T13">8 из 1</text:span><text:span text:style-name="T14">1</text:span><text:span text:style-name="T13"> </text:span></text:p>
          </draw:text-box>
        </draw:frame>
        <draw:frame draw:name="object 15" presentation:style-name="pr5" draw:text-style-name="P2" draw:layer="layout" svg:width="28.78cm" svg:height="3.158cm" svg:x="0cm" svg:y="0cm" presentation:class="title">
          <draw:text-box>
            <text:p text:style-name="P3"><text:span text:style-name="T2">Функциональность приложения</text:span></text:p>
          </draw:text-box>
        </draw:frame>
        <presentation:notes draw:style-name="dp2">
          <draw:frame presentation:style-name="pr6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Заключение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" presentation:presentation-page-layout-name="AL1T1">
        <draw:frame draw:name="object 3" draw:style-name="gr11" draw:text-style-name="P2" draw:layer="layout" svg:width="31.73cm" svg:height="12.22cm" svg:x="1.129cm" svg:y="4.632cm">
          <draw:text-box>
            <text:p text:style-name="P14"><text:span text:style-name="T10">В ходе выполнения работы были выполнены следующие задачи:</text:span></text:p>
            <text:p text:style-name="P6"><text:span text:style-name="T26">1. Разработ</text:span><text:span text:style-name="T27">ан</text:span><text:span text:style-name="T26"> пользовательск</text:span><text:span text:style-name="T27">ий </text:span><text:span text:style-name="T26">интерфейс</text:span><text:span text:style-name="T27"> </text:span><text:span text:style-name="T26">с интуитивной навигацией.</text:span></text:p>
            <text:p text:style-name="P7"><text:span text:style-name="T26">2. Создан</text:span><text:span text:style-name="T27">а</text:span><text:span text:style-name="T26"> система работы с данными и локальной базой</text:span><text:span text:style-name="T27"> данных</text:span><text:span text:style-name="T26">.</text:span></text:p>
            <text:p text:style-name="P7"><text:span text:style-name="T26">3. Реализ</text:span><text:span text:style-name="T27">ована</text:span><text:span text:style-name="T26"> бизнес-логик</text:span><text:span text:style-name="T27">а</text:span><text:span text:style-name="T26"> для тренировок и отслеживания прогресса.</text:span></text:p>
            <text:p text:style-name="P7"><text:span text:style-name="T26">4. </text:span><text:span text:style-name="T27">Сп</text:span><text:span text:style-name="T26">роектирован</text:span><text:span text:style-name="T27">о</text:span><text:span text:style-name="T26"> и разработ</text:span><text:span text:style-name="T27">ано</text:span><text:span text:style-name="T26"> серверно</text:span><text:span text:style-name="T27">е</text:span><text:span text:style-name="T26"> приложени</text:span><text:span text:style-name="T27">е</text:span><text:span text:style-name="T26"> (бэкенд).</text:span></text:p>
            <text:p text:style-name="P15"><text:span text:style-name="T26">5. </text:span><text:span text:style-name="T27">Проведено к</text:span><text:span text:style-name="T26">омплексное тестирование </text:span><text:span text:style-name="T27">мобильного приложения</text:span><text:span text:style-name="T26">, бэкенда и алгоритмов.</text:span></text:p>
            <text:p text:style-name="P14"/>
            <text:p text:style-name="P14"><text:span text:style-name="T24">Ключевое отличие:</text:span><text:span text:style-name="T23"> Реализована система адаптивного планирования, формирующая </text:span><text:span text:style-name="T24">замкнутый цикл «нагрузка – восстановление – анализ – рекомендация»</text:span></text:p>
          </draw:text-box>
        </draw:frame>
        <draw:frame draw:name="object 16" presentation:style-name="pr3" draw:text-style-name="P2" draw:layer="layout" svg:width="28.78cm" svg:height="3.158cm" svg:x="0cm" svg:y="0cm" presentation:class="title">
          <draw:text-box>
            <text:p text:style-name="P3"><text:span text:style-name="T2">Заключение</text:span></text:p>
          </draw:text-box>
        </draw:frame>
        <draw:frame draw:name="object 11" draw:style-name="gr3" draw:text-style-name="P2" draw:layer="layout" svg:width="5.222cm" svg:height="1.349cm" svg:x="27.5cm" svg:y="17.52cm">
          <draw:text-box>
            <text:p text:style-name="P8"><text:span text:style-name="T14">9</text:span><text:span text:style-name="T13"> из 1</text:span><text:span text:style-name="T14">1</text:span><text:span text:style-name="T13"> 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Slide_10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" presentation:presentation-page-layout-name="AL1T1">
        <draw:frame draw:name="object 16" presentation:style-name="pr5" draw:text-style-name="P2" draw:layer="layout" svg:width="28.8cm" svg:height="3.158cm" svg:x="0cm" svg:y="0cm" presentation:class="title">
          <draw:text-box>
            <text:p text:style-name="P3"><text:span text:style-name="T28">Публикация работы</text:span></text:p>
          </draw:text-box>
        </draw:frame>
        <draw:frame draw:style-name="gr12" draw:text-style-name="P2" draw:layer="layout" svg:width="32.28cm" svg:height="3.682cm" svg:x="1.208cm" svg:y="5.533cm">
          <draw:text-box>
            <text:p text:style-name="P16"><text:span text:style-name="T29">Автор.</text:span><text:span text:style-name="T30"> Разработка мобильного приложения для фитнеса на платформе Android // Математика, информационные технологии, приложения. Сборник трудов конференции студентов и молодых ученых. — Воронеж : ВГУ, 2026. </text:span></text:p>
          </draw:text-box>
        </draw:frame>
        <draw:frame draw:name="object 17" draw:style-name="gr13" draw:text-style-name="P17" draw:layer="layout" svg:width="5.722cm" svg:height="2.697cm" svg:x="27cm" svg:y="17.521cm">
          <draw:text-box>
            <text:p text:style-name="P8"><text:span text:style-name="T14">10</text:span><text:span text:style-name="T13"> из 1</text:span><text:span text:style-name="T14">1</text:span><text:span text:style-name="T13"> </text:span></text:p>
          </draw:text-box>
        </draw:frame>
        <presentation:notes draw:style-name="dp2">
          <draw:frame draw:name="Slide Image Placeholder 1" presentation:style-name="pr7" draw:text-style-name="P2" draw:layer="layout" svg:width="0.001cm" svg:height="65.969cm" svg:x="0cm" svg:y="-32.984cm" presentation:class="title" presentation:placeholder="true">
            <draw:text-box/>
          </draw:frame>
          <draw:frame draw:name="Notes Placeholder 2" presentation:style-name="pr8" draw:text-style-name="P2" draw:layer="layout" svg:width="0.001cm" svg:height="0.001cm" svg:x="0cm" svg:y="0cm" presentation:class="outline">
            <draw:text-box>
              <text:p/>
            </draw:text-box>
          </draw:frame>
          <draw:frame draw:name="Slide Number Placeholder 3" presentation:style-name="pr9" draw:text-style-name="P10" draw:layer="layout" svg:width="0.001cm" svg:height="0.001cm" svg:x="0cm" svg:y="0cm" presentation:class="page-number">
            <draw:text-box>
              <text:p text:style-name="P18"><text:span text:style-name="T31"><text:page-number>&lt;номер&gt;</text:page-number></text:span></text:p>
            </draw:text-box>
          </draw:frame>
        </presentation:notes>
      </draw:page>
      <draw:page draw:name="Спасибо за внимание!" draw:style-name="dp1" draw:master-pag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" presentation:presentation-page-layout-name="AL1T1">
        <draw:frame draw:name="object 2" presentation:style-name="pr10" draw:text-style-name="P2" draw:layer="layout" svg:width="20.99cm" svg:height="3.213cm" svg:x="6.44cm" svg:y="7.612cm" presentation:class="title">
          <draw:text-box>
            <text:p text:style-name="P19"><text:span text:style-name="T32">Спасибо</text:span><text:span text:style-name="T33"> </text:span><text:span text:style-name="T32">за</text:span><text:span text:style-name="T34"> </text:span><text:span text:style-name="T35">внимание!</text:span></text:p>
          </draw:text-box>
        </draw:frame>
        <presentation:notes draw:style-name="dp2">
          <draw:frame presentation:style-name="pr6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Black" svg:font-family="'Arial Black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background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" style:family="presentation">
      <style:graphic-properties draw:stroke="none" draw:fill="solid" draw:fill-color="#ffffff"/>
      <style:text-properties style:letter-kerning="true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backgroundobjects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notes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1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 style:family="presentation">
      <style:graphic-properties draw:stroke="none" draw:fill="none" draw:auto-grow-height="false" draw:fit-to-size="false" style:shrink-to-fit="true">
        <text:list-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1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2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2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1">
      <style:paragraph-properties fo:margin-top="0.4cm" fo:margin-bottom="0cm"/>
      <style:text-properties fo:font-size="28pt" style:font-size-asian="28pt" style:font-size-complex="28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3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3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2">
      <style:paragraph-properties fo:margin-top="0.3cm" fo:margin-bottom="0cm"/>
      <style:text-properties fo:font-size="24pt" style:font-size-asian="24pt" style:font-size-complex="24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4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4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3">
      <style:paragraph-properties fo:margin-top="0.2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5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5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4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6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6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5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7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7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6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8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8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7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9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9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8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subtitle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subtitle" style:family="presentation">
      <style:graphic-properties draw:stroke="none" draw:fill="none" draw:textarea-vertical-align="middle">
        <text:list-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subtitle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title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style:family="presentation">
      <style:graphic-properties draw:stroke="none" draw:fill="none" draw:textarea-vertical-align="middle">
        <text:list-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title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background" style:display-name="_______5f__5f__5f__5f_5f_5f__5f_5f_5f_5f_5f_5f_5f__5f_5f_5f_5f_5f_5f_5f__5f_5f_5f_5f_5f_5f_5f__5f_5f_5f_5f_5f_5f_5f_5f_5f_5f_5f_5f_5f_5f_5f_Title_5f_5f_5f_5f_5f_5f_5f_5f_5f_5f_5f_5f_5f_5f_5f_20_5f_5f_5f_5f_5f_5f_5f_5f_5f_5f_5f_5f_5f_5f_5f_Only-background" style:family="presentation">
      <style:graphic-properties draw:stroke="none" draw:fill="solid" draw:fill-color="#ffffff"/>
      <style:text-properties style:letter-kerning="true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backgroundobjects" style:display-name="_______5f__5f__5f__5f_5f_5f__5f_5f_5f_5f_5f_5f_5f__5f_5f_5f_5f_5f_5f_5f__5f_5f_5f_5f_5f_5f_5f__5f_5f_5f_5f_5f_5f_5f_5f_5f_5f_5f_5f_5f_5f_5f_Title_5f_5f_5f_5f_5f_5f_5f_5f_5f_5f_5f_5f_5f_5f_5f_20_5f_5f_5f_5f_5f_5f_5f_5f_5f_5f_5f_5f_5f_5f_5f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notes" style:display-name="_______5f__5f__5f__5f_5f_5f__5f_5f_5f_5f_5f_5f_5f__5f_5f_5f_5f_5f_5f_5f__5f_5f_5f_5f_5f_5f_5f__5f_5f_5f_5f_5f_5f_5f_5f_5f_5f_5f_5f_5f_5f_5f_Title_5f_5f_5f_5f_5f_5f_5f_5f_5f_5f_5f_5f_5f_5f_5f_20_5f_5f_5f_5f_5f_5f_5f_5f_5f_5f_5f_5f_5f_5f_5f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1" style:display-name="_______5f__5f__5f__5f_5f_5f__5f_5f_5f_5f_5f_5f_5f__5f_5f_5f_5f_5f_5f_5f__5f_5f_5f_5f_5f_5f_5f__5f_5f_5f_5f_5f_5f_5f_5f_5f_5f_5f_5f_5f_5f_5f_Title_5f_5f_5f_5f_5f_5f_5f_5f_5f_5f_5f_5f_5f_5f_5f_20_5f_5f_5f_5f_5f_5f_5f_5f_5f_5f_5f_5f_5f_5f_5f_Only-outline1" style:family="presentation">
      <style:graphic-properties draw:stroke="none" draw:fill="none" draw:auto-grow-height="false" draw:fit-to-size="false" style:shrink-to-fit="true">
        <text:list-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1" style:display-name="_______5f__5f__5f__5f_5f_5f__5f_5f_5f_5f_5f_5f_5f__5f_5f_5f_5f_5f_5f_5f__5f_5f_5f_5f_5f_5f_5f__5f_5f_5f_5f_5f_5f_5f_5f_5f_5f_5f_5f_5f_5f_5f_Title_5f_5f_5f_5f_5f_5f_5f_5f_5f_5f_5f_5f_5f_5f_5f_20_5f_5f_5f_5f_5f_5f_5f_5f_5f_5f_5f_5f_5f_5f_5f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2" style:display-name="_______5f__5f__5f__5f_5f_5f__5f_5f_5f_5f_5f_5f_5f__5f_5f_5f_5f_5f_5f_5f__5f_5f_5f_5f_5f_5f_5f__5f_5f_5f_5f_5f_5f_5f_5f_5f_5f_5f_5f_5f_5f_5f_Title_5f_5f_5f_5f_5f_5f_5f_5f_5f_5f_5f_5f_5f_5f_5f_20_5f_5f_5f_5f_5f_5f_5f_5f_5f_5f_5f_5f_5f_5f_5f_Only-outline2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1">
      <style:paragraph-properties fo:margin-top="0.4cm" fo:margin-bottom="0cm"/>
      <style:text-properties fo:font-size="28pt" style:font-size-asian="28pt" style:font-size-complex="28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3" style:display-name="_______5f__5f__5f__5f_5f_5f__5f_5f_5f_5f_5f_5f_5f__5f_5f_5f_5f_5f_5f_5f__5f_5f_5f_5f_5f_5f_5f__5f_5f_5f_5f_5f_5f_5f_5f_5f_5f_5f_5f_5f_5f_5f_Title_5f_5f_5f_5f_5f_5f_5f_5f_5f_5f_5f_5f_5f_5f_5f_20_5f_5f_5f_5f_5f_5f_5f_5f_5f_5f_5f_5f_5f_5f_5f_Only-outline3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2">
      <style:paragraph-properties fo:margin-top="0.3cm" fo:margin-bottom="0cm"/>
      <style:text-properties fo:font-size="24pt" style:font-size-asian="24pt" style:font-size-complex="24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4" style:display-name="_______5f__5f__5f__5f_5f_5f__5f_5f_5f_5f_5f_5f_5f__5f_5f_5f_5f_5f_5f_5f__5f_5f_5f_5f_5f_5f_5f__5f_5f_5f_5f_5f_5f_5f_5f_5f_5f_5f_5f_5f_5f_5f_Title_5f_5f_5f_5f_5f_5f_5f_5f_5f_5f_5f_5f_5f_5f_5f_20_5f_5f_5f_5f_5f_5f_5f_5f_5f_5f_5f_5f_5f_5f_5f_Only-outline4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3">
      <style:paragraph-properties fo:margin-top="0.2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5" style:display-name="_______5f__5f__5f__5f_5f_5f__5f_5f_5f_5f_5f_5f_5f__5f_5f_5f_5f_5f_5f_5f__5f_5f_5f_5f_5f_5f_5f__5f_5f_5f_5f_5f_5f_5f_5f_5f_5f_5f_5f_5f_5f_5f_Title_5f_5f_5f_5f_5f_5f_5f_5f_5f_5f_5f_5f_5f_5f_5f_20_5f_5f_5f_5f_5f_5f_5f_5f_5f_5f_5f_5f_5f_5f_5f_Only-outline5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4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6" style:display-name="_______5f__5f__5f__5f_5f_5f__5f_5f_5f_5f_5f_5f_5f__5f_5f_5f_5f_5f_5f_5f__5f_5f_5f_5f_5f_5f_5f__5f_5f_5f_5f_5f_5f_5f_5f_5f_5f_5f_5f_5f_5f_5f_Title_5f_5f_5f_5f_5f_5f_5f_5f_5f_5f_5f_5f_5f_5f_5f_20_5f_5f_5f_5f_5f_5f_5f_5f_5f_5f_5f_5f_5f_5f_5f_Only-outline6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5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7" style:display-name="_______5f__5f__5f__5f_5f_5f__5f_5f_5f_5f_5f_5f_5f__5f_5f_5f_5f_5f_5f_5f__5f_5f_5f_5f_5f_5f_5f__5f_5f_5f_5f_5f_5f_5f_5f_5f_5f_5f_5f_5f_5f_5f_Title_5f_5f_5f_5f_5f_5f_5f_5f_5f_5f_5f_5f_5f_5f_5f_20_5f_5f_5f_5f_5f_5f_5f_5f_5f_5f_5f_5f_5f_5f_5f_Only-outline7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6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8" style:display-name="_______5f__5f__5f__5f_5f_5f__5f_5f_5f_5f_5f_5f_5f__5f_5f_5f_5f_5f_5f_5f__5f_5f_5f_5f_5f_5f_5f__5f_5f_5f_5f_5f_5f_5f_5f_5f_5f_5f_5f_5f_5f_5f_Title_5f_5f_5f_5f_5f_5f_5f_5f_5f_5f_5f_5f_5f_5f_5f_20_5f_5f_5f_5f_5f_5f_5f_5f_5f_5f_5f_5f_5f_5f_5f_Only-outline8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7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9" style:display-name="_______5f__5f__5f__5f_5f_5f__5f_5f_5f_5f_5f_5f_5f__5f_5f_5f_5f_5f_5f_5f__5f_5f_5f_5f_5f_5f_5f__5f_5f_5f_5f_5f_5f_5f_5f_5f_5f_5f_5f_5f_5f_5f_Title_5f_5f_5f_5f_5f_5f_5f_5f_5f_5f_5f_5f_5f_5f_5f_20_5f_5f_5f_5f_5f_5f_5f_5f_5f_5f_5f_5f_5f_5f_5f_Only-outline9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8">
      <style:paragraph-properties fo:margin-top="0.1cm" fo:margin-bottom="0cm"/>
      <style:text-properties fo:font-size="20pt" style:font-size-asian="20pt" style:font-size-complex="20pt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subtitle" style:display-name="_______5f__5f__5f__5f_5f_5f__5f_5f_5f_5f_5f_5f_5f__5f_5f_5f_5f_5f_5f_5f__5f_5f_5f_5f_5f_5f_5f__5f_5f_5f_5f_5f_5f_5f_5f_5f_5f_5f_5f_5f_5f_5f_Title_5f_5f_5f_5f_5f_5f_5f_5f_5f_5f_5f_5f_5f_5f_5f_20_5f_5f_5f_5f_5f_5f_5f_5f_5f_5f_5f_5f_5f_5f_5f_Only-subtitle" style:family="presentation">
      <style:graphic-properties draw:stroke="none" draw:fill="none" draw:textarea-vertical-align="middle">
        <text:list-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subtitle" style:display-name="_______5f__5f__5f__5f_5f_5f__5f_5f_5f_5f_5f_5f_5f__5f_5f_5f_5f_5f_5f_5f__5f_5f_5f_5f_5f_5f_5f__5f_5f_5f_5f_5f_5f_5f_5f_5f_5f_5f_5f_5f_5f_5f_Title_5f_5f_5f_5f_5f_5f_5f_5f_5f_5f_5f_5f_5f_5f_5f_20_5f_5f_5f_5f_5f_5f_5f_5f_5f_5f_5f_5f_5f_5f_5f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title" style:display-name="_______5f__5f__5f__5f_5f_5f__5f_5f_5f_5f_5f_5f_5f__5f_5f_5f_5f_5f_5f_5f__5f_5f_5f_5f_5f_5f_5f__5f_5f_5f_5f_5f_5f_5f_5f_5f_5f_5f_5f_5f_5f_5f_Title_5f_5f_5f_5f_5f_5f_5f_5f_5f_5f_5f_5f_5f_5f_5f_20_5f_5f_5f_5f_5f_5f_5f_5f_5f_5f_5f_5f_5f_5f_5f_Only-title" style:family="presentation">
      <style:graphic-properties draw:stroke="none" draw:fill="none" draw:textarea-vertical-align="middle">
        <text:list-styl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title" style:display-name="_______5f__5f__5f__5f_5f_5f__5f_5f_5f_5f_5f_5f_5f__5f_5f_5f_5f_5f_5f_5f__5f_5f_5f_5f_5f_5f_5f__5f_5f_5f_5f_5f_5f_5f_5f_5f_5f_5f_5f_5f_5f_5f_Title_5f_5f_5f_5f_5f_5f_5f_5f_5f_5f_5f_5f_5f_5f_5f_20_5f_5f_5f_5f_5f_5f_5f_5f_5f_5f_5f_5f_5f_5f_5f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2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outline1">
      <style:graphic-properties draw:stroke="none" draw:fill="none" draw:textarea-vertical-align="top" draw:auto-grow-height="false" draw:auto-grow-width="false" loext:decorative="false"/>
      <style:paragraph-properties style:writing-mode="lr-tb"/>
    </style:style>
    <style:style style:name="Mpr3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4" style:family="presentation" style:parent-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outline1">
      <style:graphic-properties draw:stroke="none" draw:fill="none" draw:textarea-vertical-align="top" draw:auto-grow-height="false" draw:auto-grow-width="false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" style:display-name="_____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title" draw:layer="backgroundobjects" svg:width="16.934cm" svg:height="9.524cm" svg:x="1.057cm" svg:y="1.93cm" presentation:class="page"/>
        <draw:frame presentation: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and_5f_5f_5f_5f_5f_5f_5f_5f_5f_5f_5f_5f_5f_5f_5f_5f_5f_5f_5f_5f_5f_5f_5f_5f_5f_5f_5f_5f_5f_5f_5f_20_5f_5f_5f_5f_5f_5f_5f_5f_5f_5f_5f_5f_5f_5f_5f_5f_5f_5f_5f_5f_5f_5f_5f_5f_5f_5f_5f_5f_5f_5f_5f_Conten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" style:display-name="_______5f__5f__5f__5f_5f_5f__5f_5f_5f_5f_5f_5f_5f__5f_5f_5f_5f_5f_5f_5f__5f_5f_5f_5f_5f_5f_5f__5f_5f_5f_5f_5f_5f_5f_5f_5f_5f_5f_5f_5f_5f_5f_Title_5f_5f_5f_5f_5f_5f_5f_5f_5f_5f_5f_5f_5f_5f_5f_20_5f_5f_5f_5f_5f_5f_5f_5f_5f_5f_5f_5f_5f_5f_5f_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3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4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title" draw:layer="backgroundobjects" svg:width="16.934cm" svg:height="9.524cm" svg:x="1.057cm" svg:y="1.93cm" presentation:class="page"/>
        <draw:frame presentation:style-name="_5f__5f__5f__5f__5f__5f__5f_5f_5f__5f_5f_5f__5f_5f_5f__5f_5f_5f_5f_5f_5f_5f__5f_5f_5f_5f_5f_5f_5f_5f_5f_5f_5f_5f_5f_5f_5f__5f_5f_5f_5f_5f_5f_5f_5f_5f_5f_5f_5f_5f_5f_5f__5f_5f_5f_5f_5f_5f_5f_5f_5f_5f_5f_5f_5f_5f_5f__5f_5f_5f_5f_5f_5f_5f_5f_5f_5f_5f_5f_5f_5f_5f_5f_5f_5f_5f_5f_5f_5f_5f_5f_5f_5f_5f_5f_5f_5f_5f_Title_5f_5f_5f_5f_5f_5f_5f_5f_5f_5f_5f_5f_5f_5f_5f_5f_5f_5f_5f_5f_5f_5f_5f_5f_5f_5f_5f_5f_5f_5f_5f_20_5f_5f_5f_5f_5f_5f_5f_5f_5f_5f_5f_5f_5f_5f_5f_5f_5f_5f_5f_5f_5f_5f_5f_5f_5f_5f_5f_5f_5f_5f_5f_Only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dc:date>2026-06-22T12:32:10.829650889</dc:date>
    <meta:editing-duration>PT5M43S</meta:editing-duration>
    <meta:editing-cycles>5</meta:editing-cycles>
    <meta:print-date>2026-06-22T12:31:24.169233206</meta:print-date>
    <meta:printed-by>Файлы PDF</meta:printed-by>
    <meta:document-statistic meta:object-count="70"/>
  </office:meta>
</office:document-meta>
</file>