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96043583459.png" manifest:media-type="image/png"/>
  <manifest:file-entry manifest:full-path="Pictures/100000010000043800000960C39C4FE1.png" manifest:media-type="image/png"/>
  <manifest:file-entry manifest:full-path="Pictures/10000001000004380000096003213555.png" manifest:media-type="image/png"/>
  <manifest:file-entry manifest:full-path="Pictures/100000010000043800000960E89301F4.png" manifest:media-type="image/png"/>
  <manifest:file-entry manifest:full-path="Pictures/1000000100000438000009606BA73D6C.png" manifest:media-type="image/png"/>
  <manifest:file-entry manifest:full-path="Pictures/1000000100000438000009601FABCB2D.png" manifest:media-type="image/png"/>
  <manifest:file-entry manifest:full-path="Pictures/10000001000004380000096095BB8AD4.png" manifest:media-type="image/png"/>
  <manifest:file-entry manifest:full-path="Pictures/1000000100000438000009602D508D18.png" manifest:media-type="image/png"/>
  <manifest:file-entry manifest:full-path="Pictures/10000001000004380000096014A8121B.png" manifest:media-type="image/png"/>
  <manifest:file-entry manifest:full-path="Pictures/100000010000043800000960062820EB.png" manifest:media-type="image/png"/>
  <manifest:file-entry manifest:full-path="Pictures/100000010000035E00000176B06AC58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draw:fit-to-size="false" style:shrink-to-fit="false" fo:min-height="2.033cm" fo:padding-top="0.035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true" draw:fit-to-size="false" style:shrink-to-fit="false" fo:min-height="8.933cm" fo:padding-top="0.125cm" fo:padding-bottom="0.125cm" fo:padding-left="0.25cm" fo:padding-right="0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8.13cm" fo:padding-top="0.127cm" fo:padding-bottom="0.127cm" fo:padding-left="0.254cm" fo:padding-right="0.254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draw:auto-grow-height="true" draw:fit-to-size="false" style:shrink-to-fit="false" fo:min-height="1.525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style:repeat="stretch" style:mirror="none" loext:decorative="false"/>
    </style:style>
    <style:style style:name="gr7" style:family="graphic" style:parent-style-name="standard">
      <style:graphic-properties draw:stroke="none" draw:fill="none" draw:textarea-vertical-align="top" draw:auto-grow-height="true" draw:fit-to-size="false" style:shrink-to-fit="false" fo:min-height="12.065cm" fo:padding-top="0.155cm" fo:padding-bottom="0cm" fo:padding-left="0cm" fo:padding-right="0cm" loext:decorative="false"/>
      <style:paragraph-properties style:writing-mode="lr-tb"/>
    </style:style>
    <style:style style:name="pr1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true" draw:fit-to-size="false" style:shrink-to-fit="false" fo:min-height="10.797cm" fo:padding-top="0.293cm" fo:padding-bottom="0cm" fo:padding-left="0cm" fo:padding-right="0cm" loext:decorative="false"/>
      <style:paragraph-properties style:writing-mode="lr-tb"/>
    </style:style>
    <style:style style:name="pr2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3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>
      <style:graphic-properties draw:stroke="none" draw:fill="none" draw:fill-color="#ffffff" draw:textarea-vertical-align="top" draw:auto-grow-height="true" draw:fit-to-size="false" style:shrink-to-fit="false" fo:min-height="1.525cm" fo:padding-top="0cm" fo:padding-bottom="0cm" fo:padding-left="0cm" fo:padding-right="0cm" loext:decorative="false"/>
      <style:paragraph-properties style:writing-mode="lr-tb"/>
    </style:style>
    <style:style style:name="pr4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5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2.118cm" fo:padding-top="1.294cm" fo:padding-bottom="0cm" fo:padding-left="0cm" fo:padding-right="0cm" loext:decorative="false"/>
      <style:paragraph-properties style:writing-mode="lr-tb"/>
    </style:style>
    <style:style style:name="pr6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349cm" fo:padding-top="0cm" fo:padding-bottom="0cm" fo:padding-left="0cm" fo:padding-right="0cm" loext:decorative="false"/>
      <style:paragraph-properties style:writing-mode="lr-tb"/>
    </style:style>
    <style:style style:name="pr7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8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9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525cm" fo:padding-top="0cm" fo:padding-bottom="0cm" fo:padding-left="0cm" fo:padding-right="0cm" loext:decorative="false"/>
      <style:paragraph-properties style:writing-mode="lr-tb"/>
    </style:style>
    <style:style style:name="pr10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top" draw:auto-grow-height="true" draw:fit-to-size="false" style:shrink-to-fit="false" fo:min-height="3.181cm" fo:padding-top="1.294cm" fo:padding-bottom="0cm" fo:padding-left="0cm" fo:padding-right="0cm" loext:decorative="false"/>
      <style:paragraph-properties style:writing-mode="lr-tb"/>
    </style:style>
    <style:style style:name="pr11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3.181cm" fo:padding-top="0.032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.037cm" fo:margin-right="0.014cm" fo:margin-top="0.293cm" fo:margin-bottom="0cm" fo:line-height="2.06cm" fo:text-align="center" fo:text-indent="-0.002cm"/>
    </style:style>
    <style:style style:name="P2" style:family="paragraph">
      <loext:graphic-properties draw:fill="none"/>
    </style:style>
    <style:style style:name="P3" style:family="paragraph">
      <style:paragraph-properties fo:text-align="right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P5" style:family="paragraph">
      <style:paragraph-properties fo:margin-left="0.035cm" fo:margin-right="0cm" fo:margin-top="0.034cm" fo:margin-bottom="0cm" fo:line-height="100%" fo:text-align="left" fo:text-indent="0cm"/>
    </style:style>
    <style:style style:name="P6" style:family="paragraph">
      <style:paragraph-properties fo:margin-left="0.035cm" fo:margin-right="0cm" fo:margin-top="0.035cm" fo:margin-bottom="0cm" fo:line-height="100%" fo:text-align="left" fo:text-indent="0cm"/>
    </style:style>
    <style:style style:name="P7" style:family="paragraph">
      <style:paragraph-properties fo:margin-left="0cm" fo:margin-right="0cm" fo:margin-top="0cm" fo:margin-bottom="0cm" fo:line-height="100%" fo:text-align="left" fo:text-indent="0cm"/>
    </style:style>
    <style:style style:name="P8" style:family="paragraph">
      <style:paragraph-properties fo:margin-left="0cm" fo:margin-right="0cm" fo:margin-top="0.419cm" fo:margin-bottom="0.35cm" fo:line-height="100%" fo:text-align="left" fo:text-indent="0cm"/>
    </style:style>
    <style:style style:name="P9" style:family="paragraph">
      <style:paragraph-properties fo:margin-left="0cm" fo:margin-right="0cm" fo:margin-top="0cm" fo:margin-bottom="0.35cm" fo:line-height="100%" fo:text-align="left" fo:text-indent="0cm"/>
    </style:style>
    <style:style style:name="P10" style:family="paragraph">
      <style:paragraph-properties fo:margin-left="0.866cm" fo:margin-right="0cm" fo:margin-top="0cm" fo:margin-bottom="0cm" fo:line-height="1.348cm" fo:text-align="right" fo:text-indent="0cm"/>
      <style:text-properties fo:font-size="14pt" style:font-size-asian="14pt" style:font-size-complex="14pt"/>
    </style:style>
    <style:style style:name="P11" style:family="paragraph">
      <loext:graphic-properties draw:fill="none" style:repeat="stretch"/>
    </style:style>
    <style:style style:name="P12" style:family="paragraph">
      <style:paragraph-properties fo:margin-left="0.035cm" fo:margin-right="0cm" fo:text-indent="0cm"/>
    </style:style>
    <style:style style:name="P13" style:family="paragraph">
      <style:paragraph-properties fo:margin-top="0.155cm" fo:margin-bottom="0cm" fo:line-height="90%" fo:text-align="left"/>
    </style:style>
    <style:style style:name="P14" style:family="paragraph">
      <style:paragraph-properties fo:margin-top="0cm" fo:margin-bottom="0cm" fo:line-height="90%" fo:text-align="left"/>
    </style:style>
    <style:style style:name="P15" style:family="paragraph">
      <style:paragraph-properties fo:margin-left="0.035cm" fo:margin-right="0cm" fo:margin-top="0.032cm" fo:margin-bottom="0cm" fo:line-height="100%" fo:text-align="left" fo:text-indent="0cm"/>
    </style:style>
    <style:style style:name="T1" style:family="text">
      <style:text-properties fo:color="#000000" loext:opacity="100%" style:font-name="Arial" fo:font-size="54pt" fo:language="ru" fo:country="RU" style:text-underline-style="none" fo:font-weight="bold" style:font-size-asian="54pt" style:font-name-complex="Arial" style:font-size-complex="54pt"/>
    </style:style>
    <style:style style:name="T2" style:family="text">
      <style:text-properties style:text-line-through-style="none" style:text-line-through-type="none" fo:font-size="36pt" fo:language="ru" fo:country="RU" style:font-size-asian="36pt" style:font-size-complex="36pt"/>
    </style:style>
    <style:style style:name="T3" style:family="text">
      <style:text-properties fo:color="#000000" loext:opacity="100%" style:font-name="Arial" fo:font-size="44pt" style:text-underline-style="none" fo:font-weight="bold" style:font-size-asian="44pt" style:font-name-complex="Arial" style:font-size-complex="44pt"/>
    </style:style>
    <style:style style:name="T4" style:family="text">
      <style:text-properties fo:color="#000000" loext:opacity="100%" style:font-name="Arial" fo:font-size="44pt" fo:letter-spacing="-0.101cm" style:text-underline-style="none" fo:font-weight="bold" style:font-size-asian="44pt" style:font-name-complex="Arial" style:font-size-complex="44pt"/>
    </style:style>
    <style:style style:name="T5" style:family="text">
      <style:text-properties fo:color="#000000" loext:opacity="100%" style:font-name="Arial" fo:font-size="44pt" fo:letter-spacing="-0.004cm" fo:language="ru" fo:country="RU" style:text-underline-style="none" fo:font-weight="bold" style:font-size-asian="44pt" style:font-name-complex="Arial" style:font-size-complex="44pt"/>
    </style:style>
    <style:style style:name="T6" style:family="text">
      <style:text-properties fo:color="#000000" loext:opacity="100%" style:font-name="Arial" fo:font-size="44pt" fo:letter-spacing="-0.004cm" style:text-underline-style="none" fo:font-weight="bold" style:font-size-asian="44pt" style:font-name-complex="Arial" style:font-size-complex="44pt"/>
    </style:style>
    <style:style style:name="T7" style:family="text">
      <style:text-properties style:text-line-through-style="none" style:text-line-through-type="none" style:font-name="Arial" fo:font-size="24pt" fo:letter-spacing="-0.004cm" style:text-underline-style="none" fo:font-weight="bold" style:font-size-asian="24pt" style:font-name-complex="Arial" style:font-size-complex="24pt"/>
    </style:style>
    <style:style style:name="T8" style:family="text">
      <style:text-properties style:text-line-through-style="none" style:text-line-through-type="none" style:font-name="Arial" fo:font-size="24pt" fo:letter-spacing="-0.004cm" fo:language="ru" fo:country="RU" style:text-underline-style="none" fo:font-weight="bold" style:font-size-asian="24pt" style:font-name-complex="Arial" style:font-size-complex="24pt"/>
    </style:style>
    <style:style style:name="T9" style:family="text">
      <style:text-properties style:text-line-through-style="none" style:text-line-through-type="none" style:font-name="Arial" fo:font-size="24pt" fo:letter-spacing="-0.004cm" fo:language="ru" fo:country="RU" style:text-underline-style="none" style:font-size-asian="24pt" style:font-name-complex="Arial" style:font-size-complex="24pt"/>
    </style:style>
    <style:style style:name="T10" style:family="text">
      <style:text-properties style:text-line-through-style="none" style:text-line-through-type="none" style:font-name="Arial" fo:font-size="24pt" fo:language="ru" fo:country="RU" style:text-underline-style="none" style:font-size-asian="24pt" style:font-name-complex="Arial" style:font-size-complex="24pt"/>
    </style:style>
    <style:style style:name="T11" style:family="text">
      <style:text-properties style:text-line-through-style="none" style:text-line-through-type="none" style:font-name="Arial" fo:font-size="24pt" fo:language="ru" fo:country="RU" style:text-underline-style="none" fo:font-weight="bold" style:font-size-asian="24pt" style:font-name-complex="Arial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language="ru" fo:country="RU" style:font-size-asian="24pt" style:font-size-complex="24pt"/>
    </style:style>
    <style:style style:name="T14" style:family="text">
      <style:text-properties fo:color="#000000" loext:opacity="100%" style:font-name="Arial Black" fo:font-size="44pt" fo:letter-spacing="-0.004cm" fo:language="ru" fo:country="RU" style:text-underline-style="none" fo:font-weight="bold" style:font-size-asian="44pt" style:font-name-complex="Arial Black" style:font-size-complex="44pt"/>
    </style:style>
    <style:style style:name="T15" style:family="text">
      <style:text-properties style:font-name="Arial" fo:font-size="36pt" style:font-name-asian="Arial" style:font-size-asian="36pt" style:font-name-complex="Arial" style:font-size-complex="36pt"/>
    </style:style>
    <style:style style:name="T16" style:family="text">
      <style:text-properties style:font-name="Liberation Sans" fo:font-size="44pt" fo:language="ru" fo:country="RU" style:text-underline-style="none" fo:font-weight="bold" style:font-size-asian="44pt" style:font-name-complex="Liberation Sans" style:font-size-complex="4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00000" loext:opacity="100%" style:font-name="Arial" fo:font-size="24pt" style:text-underline-style="none" style:font-size-asian="24pt" style:font-name-complex="Arial" style:font-size-complex="24pt"/>
    </style:style>
    <style:style style:name="T19" style:family="text">
      <style:text-properties fo:color="#000000" loext:opacity="100%" style:font-name="Arial" fo:font-size="24pt" style:text-underline-style="none" fo:font-weight="bold" style:font-size-asian="24pt" style:font-name-complex="Arial" style:font-size-complex="24pt"/>
    </style:style>
    <style:style style:name="T20" style:family="text">
      <style:text-properties fo:color="#000000" loext:opacity="100%" style:font-name="Arial" fo:font-size="24pt" fo:language="ru" fo:country="RU" style:text-underline-style="none" style:font-size-asian="24pt" style:font-name-complex="Arial" style:font-size-complex="24pt"/>
    </style:style>
    <style:style style:name="T21" style:family="text">
      <style:text-properties fo:color="#000000" loext:opacity="100%" style:font-name="Arial Black" fo:font-size="44pt" style:text-underline-style="none" fo:font-weight="bold" style:font-size-asian="44pt" style:font-name-complex="Arial Black" style:font-size-complex="44pt"/>
    </style:style>
    <style:style style:name="T22" style:family="text">
      <style:text-properties fo:color="#000000" loext:opacity="100%" style:font-name="Arial Black" fo:font-size="44pt" fo:letter-spacing="-0.168cm" style:text-underline-style="none" fo:font-weight="bold" style:font-size-asian="44pt" style:font-name-complex="Arial Black" style:font-size-complex="44pt"/>
    </style:style>
    <style:style style:name="T23" style:family="text">
      <style:text-properties fo:color="#000000" loext:opacity="100%" style:font-name="Arial Black" fo:font-size="44pt" fo:letter-spacing="-0.004cm" style:text-underline-style="none" fo:font-weight="bold" style:font-size-asian="44pt" style:font-name-complex="Arial Black" style:font-size-complex="44pt"/>
    </style:style>
    <style:style style:name="T24" style:family="text">
      <style:text-properties style:text-line-through-style="none" style:text-line-through-type="none" style:font-name="Arial" fo:font-size="36pt" fo:language="en" fo:country="US" style:text-underline-style="none" style:font-size-asian="36pt" style:font-name-complex="Arial" style:font-size-complex="36pt"/>
    </style:style>
    <style:style style:name="T25" style:family="text">
      <style:text-properties fo:color="#000000" loext:opacity="100%" style:font-name="Arial Black" fo:font-size="44pt" fo:letter-spacing="-0.004cm" style:text-underline-style="none" style:font-size-asian="44pt" style:font-name-complex="Arial Black" style:font-size-complex="44pt"/>
    </style:style>
    <style:style style:name="T26" style:family="text">
      <style:text-properties fo:color="#000000" loext:opacity="100%" style:text-line-through-style="none" style:text-line-through-type="none" style:font-name="Arial" fo:font-size="24pt" fo:language="en" fo:country="US" style:text-underline-style="none" style:font-size-asian="24pt" style:font-name-complex="Arial" style:font-size-complex="24pt"/>
    </style:style>
    <style:style style:name="T27" style:family="text">
      <style:text-properties fo:color="#000000" loext:opacity="100%" style:text-line-through-style="none" style:text-line-through-type="none" style:font-name="Arial" fo:font-size="24pt" fo:language="ru" fo:country="RU" style:text-underline-style="none" style:font-size-asian="24pt" style:font-name-complex="Arial" style:font-size-complex="24pt"/>
    </style:style>
    <style:style style:name="T28" style:family="text">
      <style:text-properties fo:color="#000000" loext:opacity="100%" style:font-name="Arial Black" fo:font-size="44pt" style:text-underline-style="none" style:font-size-asian="44pt" style:font-name-complex="Arial Black" style:font-size-complex="44pt"/>
    </style:style>
    <style:style style:name="T29" style:family="text">
      <style:text-properties fo:color="#000000" loext:opacity="100%" style:font-name="Arial Black" fo:font-size="44pt" fo:letter-spacing="-0.042cm" style:text-underline-style="none" style:font-size-asian="44pt" style:font-name-complex="Arial Black" style:font-size-complex="44pt"/>
    </style:style>
    <style:style style:name="T30" style:family="text">
      <style:text-properties fo:color="#000000" loext:opacity="100%" style:font-name="Arial Black" fo:font-size="44pt" fo:letter-spacing="-0.034cm" style:text-underline-style="none" style:font-size-asian="44pt" style:font-name-complex="Arial Black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2" presentation:style-name="pr1" draw:text-style-name="P2" draw:layer="layout" svg:width="33.65cm" svg:height="11.09cm" svg:x="0.106cm" svg:y="1.482cm" presentation:class="outline">
          <draw:text-box>
            <text:p text:style-name="P1"><text:span text:style-name="T1">Разработка мобильного приложения для фитнеса на платформе Android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становка задачи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12" presentation:style-name="pr3" draw:text-style-name="P4" draw:layer="layout" svg:width="2.198cm" svg:height="1.525cm" svg:x="30.56cm" svg:y="17.28cm" presentation:class="page-number">
          <draw:text-box>
            <text:p text:style-name="P3"><text:span text:style-name="T2">2</text:span></text:p>
          </draw:text-box>
        </draw:frame>
        <draw:frame draw:name="object 2" presentation:style-name="pr4" draw:text-style-name="P2" draw:layer="layout" svg:width="28.78cm" svg:height="3.158cm" svg:x="0cm" svg:y="0cm" presentation:class="title">
          <draw:text-box>
            <text:p text:style-name="P5"><text:span text:style-name="T3">Постановка</text:span><text:span text:style-name="T4"> </text:span><text:span text:style-name="T5">цели и </text:span><text:span text:style-name="T6">задач</text:span></text:p>
          </draw:text-box>
        </draw:frame>
        <draw:frame draw:name="object 3" draw:style-name="gr1" draw:text-style-name="P2" draw:layer="layout" svg:width="30.47cm" svg:height="2.068cm" svg:x="2.548cm" svg:y="4.133cm">
          <draw:text-box>
            <text:p text:style-name="P6"><text:span text:style-name="T7">Цель:</text:span><text:span text:style-name="T8"> </text:span><text:span text:style-name="T9">р</text:span><text:span text:style-name="T10">азработка мобильного приложения для фитнеса на платформе Android</text:span></text:p>
          </draw:text-box>
        </draw:frame>
        <draw:frame draw:name="TextBox 13" draw:style-name="gr2" draw:text-style-name="P2" draw:layer="layout" svg:width="29.88cm" svg:height="9.183cm" svg:x="2.548cm" svg:y="7.408cm">
          <draw:text-box>
            <text:p text:style-name="P7"><text:span text:style-name="T11">Задачи:</text:span></text:p>
            <text:p text:style-name="P8"><text:span text:style-name="T12">1. Разработка пользовательского интерфейса с интуитивной навигацией</text:span><text:span text:style-name="T13">.</text:span></text:p>
            <text:p text:style-name="P9"><text:span text:style-name="T12">2. Создание системы работы с данными и локальной базой</text:span><text:span text:style-name="T13"> данных.</text:span></text:p>
            <text:p text:style-name="P9"><text:span text:style-name="T12">3. Реализация бизнес-логики для тренировок и отслеживания прогресса</text:span><text:span text:style-name="T13">.</text:span></text:p>
            <text:p text:style-name="P9"><text:span text:style-name="T12">4. Проектирование и разработка серверного приложения (бэкенда)</text:span><text:span text:style-name="T13">.</text:span></text:p>
            <text:p text:style-name="P9"><text:span text:style-name="T12">5. Комплексное тестирование </text:span><text:span text:style-name="T13">мобильного приложения</text:span><text:span text:style-name="T12">, бэкенда и алгоритмов</text:span><text:span text:style-name="T13">.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5" draw:text-style-name="P2" draw:layer="layout" svg:width="28.77cm" svg:height="3.412cm" svg:x="0.094cm" svg:y="0.4cm" presentation:class="title">
          <draw:text-box>
            <text:p text:style-name="P5"><text:span text:style-name="T14">Этапы реализации</text:span></text:p>
          </draw:text-box>
        </draw:frame>
        <draw:frame draw:name="object 4" presentation:style-name="pr6" draw:text-style-name="P4" draw:layer="layout" svg:width="1.777cm" svg:height="1.349cm" svg:x="30.94cm" svg:y="17.52cm" presentation:class="page-number">
          <draw:text-box>
            <text:p text:style-name="P10"><text:span text:style-name="T15"><text:page-number>&lt;номер&gt;</text:page-number></text:span></text:p>
          </draw:text-box>
        </draw:frame>
        <draw:frame draw:style-name="gr3" draw:text-style-name="P11" draw:layer="layout" svg:width="29.96cm" svg:height="13cm" svg:x="1.536cm" svg:y="4.14cm">
          <draw:image xlink:href="Pictures/100000010000035E00000176B06AC58A.png" xlink:type="simple" xlink:show="embed" xlink:actuate="onLoad" draw:mime-type="image/png">
            <text:p/>
          </draw:image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8" draw:text-style-name="P2" draw:layer="layout" svg:width="28.82cm" svg:height="3.158cm" svg:x="0.094cm" svg:y="0.4cm" presentation:class="title">
          <draw:text-box>
            <text:p text:style-name="P5"><text:span text:style-name="T16">Функциональность приложения</text:span></text:p>
          </draw:text-box>
        </draw:frame>
        <draw:frame draw:name="object 4" presentation:style-name="pr9" draw:text-style-name="P4" draw:layer="layout" svg:width="1.777cm" svg:height="1.525cm" svg:x="31.08cm" svg:y="17.43cm" presentation:class="page-number">
          <draw:text-box>
            <text:p text:style-name="P3"><text:span text:style-name="T17">4</text:span></text:p>
          </draw:text-box>
        </draw:frame>
        <draw:frame draw:style-name="gr4" draw:text-style-name="P2" draw:layer="layout" svg:width="29.15cm" svg:height="8.384cm" svg:x="0.643cm" svg:y="5.292cm">
          <draw:text-box>
            <text:list text:style-name="L5">
              <text:list-item>
                <text:p text:style-name="P12"><text:span text:style-name="T18">Регистрация и аутентификация.</text:span></text:p>
              </text:list-item>
              <text:list-item>
                <text:p text:style-name="P12"><text:span text:style-name="T18">Каталог тренировок и конструктор своих планов.</text:span></text:p>
              </text:list-item>
              <text:list-item>
                <text:p text:style-name="P12"><text:span text:style-name="T18">Проведение тренировки: таймер, аудиосопровождение.</text:span></text:p>
              </text:list-item>
              <text:list-item>
                <text:p text:style-name="P12"><text:span text:style-name="T18">История выполненных занятий.</text:span></text:p>
              </text:list-item>
              <text:list-item>
                <text:p text:style-name="P12"><text:span text:style-name="T18">Трекер сна</text:span></text:p>
              </text:list-item>
              <text:list-item>
                <text:p text:style-name="P12"><text:span text:style-name="T19">Интеллектуальный модуль «Советы»:</text:span><text:span text:style-name="T18"> Анализирует историю тренировок и сна и автоматически предлагает </text:span><text:span text:style-name="T20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льзовательский интерфейс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5" draw:text-style-name="P2" draw:layer="layout" svg:width="28.77cm" svg:height="3.412cm" svg:x="0cm" svg:y="0.015cm" presentation:class="title">
          <draw:text-box>
            <text:p text:style-name="P5"><text:span text:style-name="T21">Пользовательский</text:span><text:span text:style-name="T22"> </text:span><text:span text:style-name="T23">интерфейс</text:span></text:p>
          </draw:text-box>
        </draw:frame>
        <draw:frame draw:name="TextBox 2" draw:style-name="gr5" draw:text-style-name="P2" draw:layer="layout" svg:width="1.208cm" svg:height="1.775cm" svg:x="31.68cm" svg:y="17.25cm">
          <draw:text-box>
            <text:p text:style-name="P7"><text:span text:style-name="T24">5</text:span></text:p>
          </draw:text-box>
        </draw:frame>
        <draw:frame draw:style-name="gr6" draw:text-style-name="P11" draw:layer="layout" svg:width="6.332cm" svg:height="14.07cm" svg:x="20.42cm" svg:y="3.525cm">
          <draw:image xlink:href="Pictures/100000010000043800000960062820EB.png" xlink:type="simple" xlink:show="embed" xlink:actuate="onLoad" draw:mime-type="image/png">
            <text:p/>
          </draw:image>
        </draw:frame>
        <draw:frame draw:style-name="gr6" draw:text-style-name="P11" draw:layer="layout" svg:width="6.306cm" svg:height="14.01cm" svg:x="26.95cm" svg:y="3.525cm">
          <draw:image xlink:href="Pictures/1000000100000438000009602D508D18.png" xlink:type="simple" xlink:show="embed" xlink:actuate="onLoad" draw:mime-type="image/png">
            <text:p/>
          </draw:image>
        </draw:frame>
        <draw:frame draw:style-name="gr6" draw:text-style-name="P11" draw:layer="layout" svg:width="6.199cm" svg:height="13.78cm" svg:x="0.485cm" svg:y="3.819cm">
          <draw:image xlink:href="Pictures/10000001000004380000096095BB8AD4.png" xlink:type="simple" xlink:show="embed" xlink:actuate="onLoad" draw:mime-type="image/png">
            <text:p/>
          </draw:image>
        </draw:frame>
        <draw:frame draw:style-name="gr6" draw:text-style-name="P11" draw:layer="layout" svg:width="6.174cm" svg:height="13.72cm" svg:x="7.149cm" svg:y="3.819cm">
          <draw:image xlink:href="Pictures/1000000100000438000009601FABCB2D.png" xlink:type="simple" xlink:show="embed" xlink:actuate="onLoad" draw:mime-type="image/png">
            <text:p/>
          </draw:image>
        </draw:frame>
        <draw:frame draw:style-name="gr3" draw:text-style-name="P11" draw:layer="layout" svg:width="6.225cm" svg:height="13.83cm" svg:x="13.77cm" svg:y="3.665cm">
          <draw:image xlink:href="Pictures/1000000100000438000009606BA73D6C.png" xlink:type="simple" xlink:show="embed" xlink:actuate="onLoad" draw:mime-type="image/png">
            <text:p/>
          </draw:image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льзовательский интерфейс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5" draw:text-style-name="P2" draw:layer="layout" svg:width="28.77cm" svg:height="3.412cm" svg:x="0cm" svg:y="0.015cm" presentation:class="title">
          <draw:text-box>
            <text:p text:style-name="P5"><text:span text:style-name="T21">Пользовательский</text:span><text:span text:style-name="T22"> </text:span><text:span text:style-name="T23">интерфейс</text:span></text:p>
          </draw:text-box>
        </draw:frame>
        <draw:frame draw:name="TextBox 2" draw:style-name="gr5" draw:text-style-name="P2" draw:layer="layout" svg:width="1.208cm" svg:height="1.775cm" svg:x="31.68cm" svg:y="17.25cm">
          <draw:text-box>
            <text:p text:style-name="P7"><text:span text:style-name="T24">6</text:span></text:p>
          </draw:text-box>
        </draw:frame>
        <draw:frame draw:style-name="gr6" draw:text-style-name="P11" draw:layer="layout" svg:width="6.174cm" svg:height="14.06cm" svg:x="13.7cm" svg:y="3.704cm">
          <draw:image xlink:href="Pictures/100000010000043800000960E89301F4.png" xlink:type="simple" xlink:show="embed" xlink:actuate="onLoad" draw:mime-type="image/png">
            <text:p/>
          </draw:image>
        </draw:frame>
        <draw:frame draw:style-name="gr6" draw:text-style-name="P11" draw:layer="layout" svg:width="6.221cm" svg:height="13.93cm" svg:x="20.48cm" svg:y="3.704cm">
          <draw:image xlink:href="Pictures/10000001000004380000096003213555.png" xlink:type="simple" xlink:show="embed" xlink:actuate="onLoad" draw:mime-type="image/png">
            <text:p/>
          </draw:image>
        </draw:frame>
        <draw:frame draw:style-name="gr6" draw:text-style-name="P11" draw:layer="layout" svg:width="6.397cm" svg:height="13.79cm" svg:x="27.17cm" svg:y="3.849cm">
          <draw:image xlink:href="Pictures/100000010000043800000960C39C4FE1.png" xlink:type="simple" xlink:show="embed" xlink:actuate="onLoad" draw:mime-type="image/png">
            <text:p/>
          </draw:image>
        </draw:frame>
        <draw:frame draw:style-name="gr6" draw:text-style-name="P11" draw:layer="layout" svg:width="6.162cm" svg:height="13.88cm" svg:x="6.88cm" svg:y="3.849cm">
          <draw:image xlink:href="Pictures/10000001000004380000096014A8121B.png" xlink:type="simple" xlink:show="embed" xlink:actuate="onLoad" draw:mime-type="image/png">
            <text:p/>
          </draw:image>
        </draw:frame>
        <draw:frame draw:style-name="gr6" draw:text-style-name="P11" draw:layer="layout" svg:width="6.212cm" svg:height="14.11cm" svg:x="0.288cm" svg:y="3.704cm">
          <draw:image xlink:href="Pictures/10000001000004380000096043583459.png" xlink:type="simple" xlink:show="embed" xlink:actuate="onLoad" draw:mime-type="image/png">
            <text:p/>
          </draw:image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Заключение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2" presentation:style-name="pr10" draw:text-style-name="P2" draw:layer="layout" svg:width="28.77cm" svg:height="4.475cm" svg:x="2.307cm" svg:y="0.4cm" presentation:class="title">
          <draw:text-box>
            <text:p text:style-name="P5"><text:span text:style-name="T25">Заключение</text:span></text:p>
          </draw:text-box>
        </draw:frame>
        <draw:frame draw:name="object 3" draw:style-name="gr7" draw:text-style-name="P2" draw:layer="layout" svg:width="31.73cm" svg:height="12.22cm" svg:x="1.129cm" svg:y="4.632cm">
          <draw:text-box>
            <text:p text:style-name="P13"><text:span text:style-name="T11">В ходе выполнения работы были выполнены следующие задачи:</text:span></text:p>
            <text:p text:style-name="P8"><text:span text:style-name="T26">1. Разработ</text:span><text:span text:style-name="T27">ан</text:span><text:span text:style-name="T26"> пользовательск</text:span><text:span text:style-name="T27">ий </text:span><text:span text:style-name="T26">интерфейс</text:span><text:span text:style-name="T27"> </text:span><text:span text:style-name="T26">с интуитивной навигацией.</text:span></text:p>
            <text:p text:style-name="P9"><text:span text:style-name="T26">2. Создан</text:span><text:span text:style-name="T27">а</text:span><text:span text:style-name="T26"> системы работы с данными и локальной базой</text:span><text:span text:style-name="T27"> данных</text:span><text:span text:style-name="T26">.</text:span></text:p>
            <text:p text:style-name="P9"><text:span text:style-name="T26">3. Реализ</text:span><text:span text:style-name="T27">ована</text:span><text:span text:style-name="T26"> бизнес-логик</text:span><text:span text:style-name="T27">а</text:span><text:span text:style-name="T26"> для тренировок и отслеживания прогресса.</text:span></text:p>
            <text:p text:style-name="P9"><text:span text:style-name="T26">4. </text:span><text:span text:style-name="T27">Сп</text:span><text:span text:style-name="T26">роектирован</text:span><text:span text:style-name="T27">о</text:span><text:span text:style-name="T26"> и разработ</text:span><text:span text:style-name="T27">ано</text:span><text:span text:style-name="T26"> серверно</text:span><text:span text:style-name="T27">е</text:span><text:span text:style-name="T26"> приложени</text:span><text:span text:style-name="T27">е</text:span><text:span text:style-name="T26"> (бэкенд).</text:span></text:p>
            <text:p text:style-name="P14"><text:span text:style-name="T26">5. </text:span><text:span text:style-name="T27">Проведено к</text:span><text:span text:style-name="T26">омплексное тестирование </text:span><text:span text:style-name="T27">мобильного приложения</text:span><text:span text:style-name="T26">, бэкенда и алгоритмов.</text:span></text:p>
            <text:p text:style-name="P13"/>
            <text:p text:style-name="P13"><text:span text:style-name="T19">Ключевое отличие:</text:span><text:span text:style-name="T18"> Реализована система адаптивного планирования, формирующая </text:span><text:span text:style-name="T19">замкнутый цикл «нагрузка – восстановление – анализ – рекомендация»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Спасибо за внимание!" draw:style-name="dp1" draw:master-page-name="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11" draw:text-style-name="P2" draw:layer="layout" svg:width="20.99cm" svg:height="3.213cm" svg:x="6.44cm" svg:y="7.612cm" presentation:class="title">
          <draw:text-box>
            <text:p text:style-name="P15"><text:span text:style-name="T28">Спасибо</text:span><text:span text:style-name="T29"> </text:span><text:span text:style-name="T28">за</text:span><text:span text:style-name="T30"> </text:span><text:span text:style-name="T25">внимание!</text:span></text:p>
          </draw:text-box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" style:display-name="____5f__5f_5f_5f__5f_5f_5f__5f_5f_5f__5f_5f_5f_5f_5f_5f_5f_Title_5f_5f_5f_5f_5f_5f_5f_20_5f_5f_5f_5f_5f_5f_5f_and_5f_5f_5f_5f_5f_5f_5f_20_5f_5f_5f_5f_5f_5f_5f_Content-background" style:family="presentation">
      <style:graphic-properties draw:stroke="none" draw:fill="solid" draw:fill-color="#ffffff"/>
      <style:text-properties style:letter-kerning="true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 style:display-name="____5f__5f_5f_5f__5f_5f_5f__5f_5f_5f__5f_5f_5f_5f_5f_5f_5f_Title_5f_5f_5f_5f_5f_5f_5f_20_5f_5f_5f_5f_5f_5f_5f_and_5f_5f_5f_5f_5f_5f_5f_20_5f_5f_5f_5f_5f_5f_5f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style:display-name="____5f__5f_5f_5f__5f_5f_5f__5f_5f_5f__5f_5f_5f_5f_5f_5f_5f_Title_5f_5f_5f_5f_5f_5f_5f_20_5f_5f_5f_5f_5f_5f_5f_and_5f_5f_5f_5f_5f_5f_5f_20_5f_5f_5f_5f_5f_5f_5f_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display-name="____5f__5f_5f_5f__5f_5f_5f__5f_5f_5f__5f_5f_5f_5f_5f_5f_5f_Title_5f_5f_5f_5f_5f_5f_5f_20_5f_5f_5f_5f_5f_5f_5f_and_5f_5f_5f_5f_5f_5f_5f_20_5f_5f_5f_5f_5f_5f_5f_Content-outline1" style:family="presentation">
      <style:graphic-properties draw:stroke="none" draw:fill="none" draw:auto-grow-height="false" draw:fit-to-size="false" style:shrink-to-fit="true">
        <text:list-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display-name="____5f__5f_5f_5f__5f_5f_5f__5f_5f_5f__5f_5f_5f_5f_5f_5f_5f_Title_5f_5f_5f_5f_5f_5f_5f_20_5f_5f_5f_5f_5f_5f_5f_and_5f_5f_5f_5f_5f_5f_5f_20_5f_5f_5f_5f_5f_5f_5f_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 style:display-name="____5f__5f_5f_5f__5f_5f_5f__5f_5f_5f__5f_5f_5f_5f_5f_5f_5f_Title_5f_5f_5f_5f_5f_5f_5f_20_5f_5f_5f_5f_5f_5f_5f_and_5f_5f_5f_5f_5f_5f_5f_20_5f_5f_5f_5f_5f_5f_5f_Content-outline2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paragraph-properties fo:margin-top="0.4cm" fo:margin-bottom="0cm"/>
      <style:text-properties fo:font-size="28pt" style:font-size-asian="28pt" style:font-size-complex="28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 style:display-name="____5f__5f_5f_5f__5f_5f_5f__5f_5f_5f__5f_5f_5f_5f_5f_5f_5f_Title_5f_5f_5f_5f_5f_5f_5f_20_5f_5f_5f_5f_5f_5f_5f_and_5f_5f_5f_5f_5f_5f_5f_20_5f_5f_5f_5f_5f_5f_5f_Content-outline3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>
      <style:paragraph-properties fo:margin-top="0.3cm" fo:margin-bottom="0cm"/>
      <style:text-properties fo:font-size="24pt" style:font-size-asian="24pt" style:font-size-complex="24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 style:display-name="____5f__5f_5f_5f__5f_5f_5f__5f_5f_5f__5f_5f_5f_5f_5f_5f_5f_Title_5f_5f_5f_5f_5f_5f_5f_20_5f_5f_5f_5f_5f_5f_5f_and_5f_5f_5f_5f_5f_5f_5f_20_5f_5f_5f_5f_5f_5f_5f_Content-outline4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>
      <style:paragraph-properties fo:margin-top="0.2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 style:display-name="____5f__5f_5f_5f__5f_5f_5f__5f_5f_5f__5f_5f_5f_5f_5f_5f_5f_Title_5f_5f_5f_5f_5f_5f_5f_20_5f_5f_5f_5f_5f_5f_5f_and_5f_5f_5f_5f_5f_5f_5f_20_5f_5f_5f_5f_5f_5f_5f_Content-outline5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 style:display-name="____5f__5f_5f_5f__5f_5f_5f__5f_5f_5f__5f_5f_5f_5f_5f_5f_5f_Title_5f_5f_5f_5f_5f_5f_5f_20_5f_5f_5f_5f_5f_5f_5f_and_5f_5f_5f_5f_5f_5f_5f_20_5f_5f_5f_5f_5f_5f_5f_Content-outline6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 style:display-name="____5f__5f_5f_5f__5f_5f_5f__5f_5f_5f__5f_5f_5f_5f_5f_5f_5f_Title_5f_5f_5f_5f_5f_5f_5f_20_5f_5f_5f_5f_5f_5f_5f_and_5f_5f_5f_5f_5f_5f_5f_20_5f_5f_5f_5f_5f_5f_5f_Content-outline7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 style:display-name="____5f__5f_5f_5f__5f_5f_5f__5f_5f_5f__5f_5f_5f_5f_5f_5f_5f_Title_5f_5f_5f_5f_5f_5f_5f_20_5f_5f_5f_5f_5f_5f_5f_and_5f_5f_5f_5f_5f_5f_5f_20_5f_5f_5f_5f_5f_5f_5f_Content-outline8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9" style:display-name="____5f__5f_5f_5f__5f_5f_5f__5f_5f_5f__5f_5f_5f_5f_5f_5f_5f_Title_5f_5f_5f_5f_5f_5f_5f_20_5f_5f_5f_5f_5f_5f_5f_and_5f_5f_5f_5f_5f_5f_5f_20_5f_5f_5f_5f_5f_5f_5f_Content-outline9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display-name="____5f__5f_5f_5f__5f_5f_5f__5f_5f_5f__5f_5f_5f_5f_5f_5f_5f_Title_5f_5f_5f_5f_5f_5f_5f_20_5f_5f_5f_5f_5f_5f_5f_and_5f_5f_5f_5f_5f_5f_5f_20_5f_5f_5f_5f_5f_5f_5f_Content-subtitle" style:family="presentation">
      <style:graphic-properties draw:stroke="none" draw:fill="none" draw:textarea-vertical-align="middle">
        <text:list-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display-name="____5f__5f_5f_5f__5f_5f_5f__5f_5f_5f__5f_5f_5f_5f_5f_5f_5f_Title_5f_5f_5f_5f_5f_5f_5f_20_5f_5f_5f_5f_5f_5f_5f_and_5f_5f_5f_5f_5f_5f_5f_20_5f_5f_5f_5f_5f_5f_5f_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display-name="____5f__5f_5f_5f__5f_5f_5f__5f_5f_5f__5f_5f_5f_5f_5f_5f_5f_Title_5f_5f_5f_5f_5f_5f_5f_20_5f_5f_5f_5f_5f_5f_5f_and_5f_5f_5f_5f_5f_5f_5f_20_5f_5f_5f_5f_5f_5f_5f_Content-title" style:family="presentation">
      <style:graphic-properties draw:stroke="none" draw:fill="none" draw:textarea-vertical-align="middle">
        <text:list-styl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display-name="____5f__5f_5f_5f__5f_5f_5f__5f_5f_5f__5f_5f_5f_5f_5f_5f_5f_Title_5f_5f_5f_5f_5f_5f_5f_20_5f_5f_5f_5f_5f_5f_5f_and_5f_5f_5f_5f_5f_5f_5f_20_5f_5f_5f_5f_5f_5f_5f_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background" style:display-name="____5f__5f_5f_5f__5f_5f_5f__5f_5f_5f__5f_5f_5f_5f_5f_5f_5f_Title_5f_5f_5f_5f_5f_5f_5f_20_5f_5f_5f_5f_5f_5f_5f_Only-background" style:family="presentation">
      <style:graphic-properties draw:stroke="none" draw:fill="solid" draw:fill-color="#ffffff"/>
      <style:text-properties style:letter-kerning="true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backgroundobjects" style:display-name="____5f__5f_5f_5f__5f_5f_5f__5f_5f_5f__5f_5f_5f_5f_5f_5f_5f_Title_5f_5f_5f_5f_5f_5f_5f_20_5f_5f_5f_5f_5f_5f_5f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notes" style:display-name="____5f__5f_5f_5f__5f_5f_5f__5f_5f_5f__5f_5f_5f_5f_5f_5f_5f_Title_5f_5f_5f_5f_5f_5f_5f_20_5f_5f_5f_5f_5f_5f_5f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1" style:display-name="____5f__5f_5f_5f__5f_5f_5f__5f_5f_5f__5f_5f_5f_5f_5f_5f_5f_Title_5f_5f_5f_5f_5f_5f_5f_20_5f_5f_5f_5f_5f_5f_5f_Only-outline1" style:family="presentation">
      <style:graphic-properties draw:stroke="none" draw:fill="none" draw:auto-grow-height="false" draw:fit-to-size="false" style:shrink-to-fit="true">
        <text:list-style style:name="_5f__5f__5f__5f_5f_5f__5f_5f_5f_5f_5f_5f_5f__5f_5f_5f_5f_5f_5f_5f__5f_5f_5f_5f_5f_5f_5f__5f_5f_5f_5f_5f_5f_5f_5f_5f_5f_5f_5f_5f_5f_5f_Title_5f_5f_5f_5f_5f_5f_5f_5f_5f_5f_5f_5f_5f_5f_5f_20_5f_5f_5f_5f_5f_5f_5f_5f_5f_5f_5f_5f_5f_5f_5f_Only-outline1" style:display-name="____5f__5f_5f_5f__5f_5f_5f__5f_5f_5f__5f_5f_5f_5f_5f_5f_5f_Title_5f_5f_5f_5f_5f_5f_5f_20_5f_5f_5f_5f_5f_5f_5f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2" style:display-name="____5f__5f_5f_5f__5f_5f_5f__5f_5f_5f__5f_5f_5f_5f_5f_5f_5f_Title_5f_5f_5f_5f_5f_5f_5f_20_5f_5f_5f_5f_5f_5f_5f_Only-outline2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1">
      <style:paragraph-properties fo:margin-top="0.4cm" fo:margin-bottom="0cm"/>
      <style:text-properties fo:font-size="28pt" style:font-size-asian="28pt" style:font-size-complex="28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3" style:display-name="____5f__5f_5f_5f__5f_5f_5f__5f_5f_5f__5f_5f_5f_5f_5f_5f_5f_Title_5f_5f_5f_5f_5f_5f_5f_20_5f_5f_5f_5f_5f_5f_5f_Only-outline3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2">
      <style:paragraph-properties fo:margin-top="0.3cm" fo:margin-bottom="0cm"/>
      <style:text-properties fo:font-size="24pt" style:font-size-asian="24pt" style:font-size-complex="24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4" style:display-name="____5f__5f_5f_5f__5f_5f_5f__5f_5f_5f__5f_5f_5f_5f_5f_5f_5f_Title_5f_5f_5f_5f_5f_5f_5f_20_5f_5f_5f_5f_5f_5f_5f_Only-outline4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3">
      <style:paragraph-properties fo:margin-top="0.2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5" style:display-name="____5f__5f_5f_5f__5f_5f_5f__5f_5f_5f__5f_5f_5f_5f_5f_5f_5f_Title_5f_5f_5f_5f_5f_5f_5f_20_5f_5f_5f_5f_5f_5f_5f_Only-outline5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4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6" style:display-name="____5f__5f_5f_5f__5f_5f_5f__5f_5f_5f__5f_5f_5f_5f_5f_5f_5f_Title_5f_5f_5f_5f_5f_5f_5f_20_5f_5f_5f_5f_5f_5f_5f_Only-outline6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5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7" style:display-name="____5f__5f_5f_5f__5f_5f_5f__5f_5f_5f__5f_5f_5f_5f_5f_5f_5f_Title_5f_5f_5f_5f_5f_5f_5f_20_5f_5f_5f_5f_5f_5f_5f_Only-outline7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6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8" style:display-name="____5f__5f_5f_5f__5f_5f_5f__5f_5f_5f__5f_5f_5f_5f_5f_5f_5f_Title_5f_5f_5f_5f_5f_5f_5f_20_5f_5f_5f_5f_5f_5f_5f_Only-outline8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7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outline9" style:display-name="____5f__5f_5f_5f__5f_5f_5f__5f_5f_5f__5f_5f_5f_5f_5f_5f_5f_Title_5f_5f_5f_5f_5f_5f_5f_20_5f_5f_5f_5f_5f_5f_5f_Only-outline9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8">
      <style:paragraph-properties fo:margin-top="0.1cm" fo:margin-bottom="0cm"/>
      <style:text-properties fo:font-size="20pt" style:font-size-asian="20pt" style:font-size-complex="20pt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subtitle" style:display-name="____5f__5f_5f_5f__5f_5f_5f__5f_5f_5f__5f_5f_5f_5f_5f_5f_5f_Title_5f_5f_5f_5f_5f_5f_5f_20_5f_5f_5f_5f_5f_5f_5f_Only-subtitle" style:family="presentation">
      <style:graphic-properties draw:stroke="none" draw:fill="none" draw:textarea-vertical-align="middle">
        <text:list-style style:name="_5f__5f__5f__5f_5f_5f__5f_5f_5f_5f_5f_5f_5f__5f_5f_5f_5f_5f_5f_5f__5f_5f_5f_5f_5f_5f_5f__5f_5f_5f_5f_5f_5f_5f_5f_5f_5f_5f_5f_5f_5f_5f_Title_5f_5f_5f_5f_5f_5f_5f_5f_5f_5f_5f_5f_5f_5f_5f_20_5f_5f_5f_5f_5f_5f_5f_5f_5f_5f_5f_5f_5f_5f_5f_Only-subtitle" style:display-name="____5f__5f_5f_5f__5f_5f_5f__5f_5f_5f__5f_5f_5f_5f_5f_5f_5f_Title_5f_5f_5f_5f_5f_5f_5f_20_5f_5f_5f_5f_5f_5f_5f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5f_5f__5f_5f_5f_5f_5f_5f_5f__5f_5f_5f_5f_5f_5f_5f__5f_5f_5f_5f_5f_5f_5f__5f_5f_5f_5f_5f_5f_5f_5f_5f_5f_5f_5f_5f_5f_5f_Title_5f_5f_5f_5f_5f_5f_5f_5f_5f_5f_5f_5f_5f_5f_5f_20_5f_5f_5f_5f_5f_5f_5f_5f_5f_5f_5f_5f_5f_5f_5f_Only-title" style:display-name="____5f__5f_5f_5f__5f_5f_5f__5f_5f_5f__5f_5f_5f_5f_5f_5f_5f_Title_5f_5f_5f_5f_5f_5f_5f_20_5f_5f_5f_5f_5f_5f_5f_Only-title" style:family="presentation">
      <style:graphic-properties draw:stroke="none" draw:fill="none" draw:textarea-vertical-align="middle">
        <text:list-style style:name="_5f__5f__5f__5f_5f_5f__5f_5f_5f_5f_5f_5f_5f__5f_5f_5f_5f_5f_5f_5f__5f_5f_5f_5f_5f_5f_5f__5f_5f_5f_5f_5f_5f_5f_5f_5f_5f_5f_5f_5f_5f_5f_Title_5f_5f_5f_5f_5f_5f_5f_5f_5f_5f_5f_5f_5f_5f_5f_20_5f_5f_5f_5f_5f_5f_5f_5f_5f_5f_5f_5f_5f_5f_5f_Only-title" style:display-name="____5f__5f_5f_5f__5f_5f_5f__5f_5f_5f__5f_5f_5f_5f_5f_5f_5f_Title_5f_5f_5f_5f_5f_5f_5f_20_5f_5f_5f_5f_5f_5f_5f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2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r3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4" style:family="presentation" style:parent-style-name="_5f__5f__5f__5f_5f_5f__5f_5f_5f_5f_5f_5f_5f__5f_5f_5f_5f_5f_5f_5f__5f_5f_5f_5f_5f_5f_5f__5f_5f_5f_5f_5f_5f_5f_5f_5f_5f_5f_5f_5f_5f_5f_Title_5f_5f_5f_5f_5f_5f_5f_5f_5f_5f_5f_5f_5f_5f_5f_20_5f_5f_5f_5f_5f_5f_5f_5f_5f_5f_5f_5f_5f_5f_5f_Only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style:display-name="____5f__5f_5f_5f__5f_5f_5f__5f_5f_5f__5f_5f_5f_5f_5f_5f_5f_Title_5f_5f_5f_5f_5f_5f_5f_20_5f_5f_5f_5f_5f_5f_5f_and_5f_5f_5f_5f_5f_5f_5f_20_5f_5f_5f_5f_5f_5f_5f_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draw:layer="backgroundobjects" svg:width="16.934cm" svg:height="9.524cm" svg:x="1.057cm" svg:y="1.93cm" presentation:class="page"/>
        <draw:frame presentation:style-name="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_5f__5f_5f_5f__5f_5f_5f_5f_5f_5f_5f__5f_5f_5f_5f_5f_5f_5f__5f_5f_5f_5f_5f_5f_5f__5f_5f_5f_5f_5f_5f_5f_5f_5f_5f_5f_5f_5f_5f_5f_Title_5f_5f_5f_5f_5f_5f_5f_5f_5f_5f_5f_5f_5f_5f_5f_20_5f_5f_5f_5f_5f_5f_5f_5f_5f_5f_5f_5f_5f_5f_5f_Only" style:display-name="____5f__5f_5f_5f__5f_5f_5f__5f_5f_5f__5f_5f_5f_5f_5f_5f_5f_Title_5f_5f_5f_5f_5f_5f_5f_20_5f_5f_5f_5f_5f_5f_5f_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3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4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_5f_5f_5f__5f_5f_5f_5f_5f_5f_5f__5f_5f_5f_5f_5f_5f_5f__5f_5f_5f_5f_5f_5f_5f__5f_5f_5f_5f_5f_5f_5f_5f_5f_5f_5f_5f_5f_5f_5f_Title_5f_5f_5f_5f_5f_5f_5f_5f_5f_5f_5f_5f_5f_5f_5f_20_5f_5f_5f_5f_5f_5f_5f_5f_5f_5f_5f_5f_5f_5f_5f_Only-title" draw:layer="backgroundobjects" svg:width="16.934cm" svg:height="9.524cm" svg:x="1.057cm" svg:y="1.93cm" presentation:class="page"/>
        <draw:frame presentation:style-name="_5f__5f__5f__5f_5f_5f__5f_5f_5f_5f_5f_5f_5f__5f_5f_5f_5f_5f_5f_5f__5f_5f_5f_5f_5f_5f_5f__5f_5f_5f_5f_5f_5f_5f_5f_5f_5f_5f_5f_5f_5f_5f_Title_5f_5f_5f_5f_5f_5f_5f_5f_5f_5f_5f_5f_5f_5f_5f_20_5f_5f_5f_5f_5f_5f_5f_5f_5f_5f_5f_5f_5f_5f_5f_Only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dc:date>2026-06-22T12:35:21.350173892</dc:date>
    <meta:editing-duration>PT7S</meta:editing-duration>
    <meta:editing-cycles>1</meta:editing-cycles>
    <meta:document-statistic meta:object-count="54"/>
  </office:meta>
</office:document-meta>
</file>